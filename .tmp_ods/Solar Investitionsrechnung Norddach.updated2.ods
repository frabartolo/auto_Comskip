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6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1.9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94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482cm"/>
    </style:style>
    <style:style style:name="co10" style:family="table-column">
      <style:table-column-properties fo:break-before="auto" style:column-width="1.864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3.348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3.849cm"/>
    </style:style>
    <style:style style:name="co15" style:family="table-column">
      <style:table-column-properties fo:break-before="auto" style:column-width="4.35cm"/>
    </style:style>
    <style:style style:name="co16" style:family="table-column">
      <style:table-column-properties fo:break-before="auto" style:column-width="1.744cm"/>
    </style:style>
    <style:style style:name="co17" style:family="table-column">
      <style:table-column-properties fo:break-before="auto" style:column-width="3.002cm"/>
    </style:style>
    <style:style style:name="co18" style:family="table-column">
      <style:table-column-properties fo:break-before="auto" style:column-width="3.187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2.828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8.602cm"/>
    </style:style>
    <style:style style:name="co25" style:family="table-column">
      <style:table-column-properties fo:break-before="auto" style:column-width="8.89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Übersicht">
      <style:table-properties table:display="true" style:writing-mode="lr-tb"/>
    </style:style>
    <style:style style:name="ta2" style:family="table" style:master-page-name="PageStyle_5f_Jahresrechnung">
      <style:table-properties table:display="true" style:writing-mode="lr-tb"/>
    </style:style>
    <style:style style:name="ta3" style:family="table" style:master-page-name="PageStyle_5f_Sensitivität">
      <style:table-properties table:display="true" style:writing-mode="lr-tb"/>
    </style:style>
    <style:style style:name="ta4" style:family="table" style:master-page-name="PageStyle_5f_Annahme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3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4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42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3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4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4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Übersich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NVESTITIONSRECHNUNG NORDDACH-P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W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tion</text:p>
          </table:table-cell>
          <table:table-cell table:style-name="ce5" table:formula="of:=[$Annahmen.B14]" office:value-type="currency" office:currency="EUR" office:value="18007.88" calcext:value-type="currency">
            <text:p>18.007,88 €</text:p>
          </table:table-cell>
          <table:table-cell table:style-name="ce12" office:value-type="string" calcext:value-type="string">
            <text:p>Plan Wp</text:p>
          </table:table-cell>
          <table:table-cell table:style-name="ce12" office:value-type="string" calcext:value-type="string">
            <text:p>max W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lagengröße</text:p>
          </table:table-cell>
          <table:table-cell table:style-name="ce6" table:formula="of:=[$Annahmen.B8]" office:value-type="float" office:value="16.56" calcext:value-type="float">
            <text:p>17 kWp</text:p>
          </table:table-cell>
          <table:table-cell table:style-name="ce13" table:formula="of:=[.D5]/36*1000" office:value-type="float" office:value="460" calcext:value-type="float">
            <text:p>460</text:p>
          </table:table-cell>
          <table:table-cell table:style-name="ce6" table:formula="of:=460*36/1000" office:value-type="float" office:value="16.56" calcext:value-type="float">
            <text:p>17 kW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ährlicher Ertrag (Jahr 1) - PVGIS</text:p>
          </table:table-cell>
          <table:table-cell table:style-name="ce7" table:formula="of:=[$Annahmen.B10]" office:value-type="float" office:value="11297" calcext:value-type="float">
            <text:p>11.297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zifischer Ertrag - PVGIS</text:p>
          </table:table-cell>
          <table:table-cell table:style-name="ce8" table:formula="of:=[$Annahmen.B9]" office:value-type="float" office:value="753" calcext:value-type="float">
            <text:p>753 kWh/kW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mpreis</text:p>
          </table:table-cell>
          <table:table-cell table:style-name="ce9" table:formula="of:=[$Annahmen.B18]" office:value-type="float" office:value="0.32" calcext:value-type="float">
            <text:p>0,32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bis 10 kWp)</text:p>
          </table:table-cell>
          <table:table-cell table:style-name="ce9" table:formula="of:=[$Annahmen.B19]" office:value-type="float" office:value="0.0778" calcext:value-type="float">
            <text:p>0,08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über 10 kWp)</text:p>
          </table:table-cell>
          <table:table-cell table:style-name="ce9" table:formula="of:=[$Annahmen.B20]" office:value-type="float" office:value="0.0673" calcext:value-type="float">
            <text:p>0,07 €/kW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RGEBNISS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Amortisationszeit</text:p>
          </table:table-cell>
          <table:table-cell table:style-name="ce10" table:formula="of:=VLOOKUP(&quot;JA&quot;; [$Jahresrechnung.N1:.O27]; 2; 0)" office:value-type="float" office:value="12000" calcext:value-type="float">
            <text:p>12.000 <text:s/>Jahre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Gesamtertrag 20 Jahre (nominal)</text:p>
          </table:table-cell>
          <table:table-cell table:style-name="ce5" table:formula="of:=MAX([$Jahresrechnung.L2:.L22])" office:value-type="currency" office:currency="EUR" office:value="53115.1086304494" calcext:value-type="currency">
            <text:p>53.115,11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amtertrag 20 Jahre (kumuliert)</text:p>
          </table:table-cell>
          <table:table-cell table:style-name="ce5" table:formula="of:=MAX([$Jahresrechnung.L2:.L22])-[$Annahmen.$B$14]" office:value-type="currency" office:currency="EUR" office:value="35107.2286304494" calcext:value-type="currency">
            <text:p>35.107,23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italwert 20 Jahre (NPV, 3% Diskont)</text:p>
          </table:table-cell>
          <table:table-cell table:style-name="ce5" table:formula="of:=NPV([$Annahmen.B39];(-1*[$Annahmen.B14]);[$Jahresrechnung.J3:.J22])" office:value-type="currency" office:currency="EUR" office:value="23934.8568823992" calcext:value-type="currency">
            <text:p>23.934,86 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ner Zinsfuß 20 Jahre (IRR)</text:p>
          </table:table-cell>
          <table:table-cell table:style-name="ce11" table:formula="of:=IRR([$Jahresrechnung.J2:.J22])" office:value-type="percentage" office:value="0.21176874752435" calcext:value-type="percentage">
            <text:p>21,18 %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Gesamtertrag 25 Jahre (nominal)</text:p>
          </table:table-cell>
          <table:table-cell table:style-name="ce5" table:formula="of:=MAX([$Jahresrechnung.L2:.L27])" office:value-type="currency" office:currency="EUR" office:value="60644.9602281173" calcext:value-type="currency">
            <text:p>60.644,96 €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Gesamtertrag 25 Jahre (kumuliert)</text:p>
          </table:table-cell>
          <table:table-cell table:style-name="ce5" table:formula="of:=MAX([$Jahresrechnung.L2:.L27])-[$Annahmen.$B$14]" office:value-type="currency" office:currency="EUR" office:value="42637.0802281173" calcext:value-type="currency">
            <text:p>42.637,08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italwert 25 Jahre(NPV, 3% Diskont)</text:p>
          </table:table-cell>
          <table:table-cell table:style-name="ce5" table:formula="of:=NPV([$Annahmen.B39];(-1*[$Annahmen.B14]);[$Jahresrechnung.J3:.J27])" office:value-type="currency" office:currency="EUR" office:value="27643.3421162508" calcext:value-type="currency">
            <text:p>27.643,34 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ner Zinsfuß 25 Jahre (IRR)</text:p>
          </table:table-cell>
          <table:table-cell table:style-name="ce11" table:formula="of:=IRR([$Jahresrechnung.J2:.J27])" office:value-type="percentage" office:value="0.213287447825889" calcext:value-type="percentage">
            <text:p>21,33 %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PRETATI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✓ Wirtschaftlich rent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wertung</text:p>
          </table:table-cell>
          <table:table-cell table:formula="of:=&quot;Die Anlage amortisiert sich nach &quot;&amp;[.B13]&amp;&quot; Jahren und erwirtschaftet über 25 Jahre einen Gewinn von &quot;&amp; ROUND([.B19];2) &amp; &quot; € (nominal).&quot;" office:value-type="string" office:string-value="Die Anlage amortisiert sich nach 12000 Jahren und erwirtschaftet über 25 Jahre einen Gewinn von 42637,08 € (nominal)." calcext:value-type="string">
            <text:p>Die Anlage amortisiert sich nach 12000 Jahren und erwirtschaftet über 25 Jahre einen Gewinn von 42637,08 € (nominal)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VGIS-Simulation bestätigt mit 7,6% einen höheren Ertrag als konservativ geschätz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ite</text:p>
          </table:table-cell>
          <table:table-cell table:formula="of:=&quot;Die interne Verzinsung von &quot; &amp; ROUND([.B21]*100;2) &amp; &quot;% liegt deutlich über der üblichen sicheren anlageformen und der inflationsrate.&quot;" office:value-type="string" office:string-value="Die interne Verzinsung von 21,33% liegt deutlich über der üblichen sicheren anlageformen und der inflationsrate." calcext:value-type="string">
            <text:p>Die interne Verzinsung von 21,33% liegt deutlich über der üblichen sicheren anlageformen und der inflationsrate.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hresrechnung" table:style-name="ta2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/>
        <table:table-column table:style-name="co5" table:number-columns-repeated="1009" table:default-cell-style-name="Default"/>
        <table:table-row table:style-name="ro1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PV-Ertrag (kWh)</text:p>
          </table:table-cell>
          <table:table-cell table:style-name="ce2" office:value-type="string" calcext:value-type="string">
            <text:p>Stromverbrauch (kWh)</text:p>
          </table:table-cell>
          <table:table-cell table:style-name="ce2" office:value-type="string" calcext:value-type="string">
            <text:p>Eigenverbrauch (kWh)</text:p>
          </table:table-cell>
          <table:table-cell table:style-name="ce2" office:value-type="string" calcext:value-type="string">
            <text:p>Quote</text:p>
          </table:table-cell>
          <table:table-cell table:style-name="ce2" office:value-type="string" calcext:value-type="string">
            <text:p>Einspeisung (kWh)</text:p>
          </table:table-cell>
          <table:table-cell table:style-name="ce2" office:value-type="string" calcext:value-type="string">
            <text:p>Ersparnis EV (€)</text:p>
          </table:table-cell>
          <table:table-cell table:style-name="ce2" office:value-type="string" calcext:value-type="string">
            <text:p>Einspeisevergütung (€)</text:p>
          </table:table-cell>
          <table:table-cell table:style-name="ce16" office:value-type="string" calcext:value-type="string">
            <text:p>Betriebskosten (€)</text:p>
          </table:table-cell>
          <table:table-cell table:style-name="ce16" office:value-type="string" calcext:value-type="string">
            <text:p>Jahresertrag netto (€)</text:p>
          </table:table-cell>
          <table:table-cell table:style-name="ce16" office:value-type="string" calcext:value-type="string">
            <text:p>RoI</text:p>
          </table:table-cell>
          <table:table-cell table:style-name="ce2" office:value-type="string" calcext:value-type="string">
            <text:p>Kumuliert (€)</text:p>
          </table:table-cell>
          <table:table-cell table:style-name="ce2" office:value-type="string" calcext:value-type="string">
            <text:p>Diskontiert (€)</text:p>
          </table:table-cell>
          <table:table-cell table:style-name="ce2" office:value-type="string" calcext:value-type="string">
            <text:p>Amortisation</text:p>
          </table:table-cell>
          <table:table-cell table:style-name="ce2" office:value-type="string" calcext:value-type="string">
            <text:p>PV-Alt (kWh)</text:p>
          </table:table-cell>
          <table:table-cell table:style-name="ce2" office:value-type="string" calcext:value-type="string">
            <text:p>EV-Alt (kWh)</text:p>
          </table:table-cell>
          <table:table-cell table:style-name="ce2" office:value-type="string" calcext:value-type="string">
            <text:p>Einspeisung-Alt (kWh)</text:p>
          </table:table-cell>
          <table:table-cell table:style-name="ce2" office:value-type="string" calcext:value-type="string">
            <text:p>Ersparnis EV-Alt (€)</text:p>
          </table:table-cell>
          <table:table-cell table:style-name="ce2" office:value-type="string" calcext:value-type="string">
            <text:p>Einspeisevergütung-Alt (€)</text:p>
          </table:table-cell>
          <table:table-cell table:style-name="ce2" office:value-type="string" calcext:value-type="string">
            <text:p>Alt-Ertrag netto (€)</text:p>
          </table:table-cell>
          <table:table-cell table:style-name="ce2" table:number-columns-repeated="1004"/>
        </table:table-row>
        <table:table-row table:style-name="ro1">
          <table:table-cell table:style-name="ce2" table:number-columns-repeated="8"/>
          <table:table-cell table:style-name="ce16"/>
          <table:table-cell table:style-name="ce16" table:formula="of:=(-1)*[$Annahmen.B14]" office:value-type="currency" office:currency="EUR" office:value="-18007.88" calcext:value-type="currency">
            <text:p>-18.007,88 €</text:p>
          </table:table-cell>
          <table:table-cell table:style-name="ce16"/>
          <table:table-cell table:style-name="ce2" table:number-columns-repeated="5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Annahmen.$B$9]*[$Annahmen.$B$8]" office:value-type="float" office:value="12469.68" calcext:value-type="float">
            <text:p>12469,68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3]*[.E3];MAX([.C3]-[.P3];0))" office:value-type="float" office:value="4987.872" calcext:value-type="float">
            <text:p>4988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3]-[.D3];0)" office:value-type="float" office:value="7481.808" calcext:value-type="float">
            <text:p>7482</text:p>
          </table:table-cell>
          <table:table-cell table:style-name="ce5" table:formula="of:=[.D3]*[$Annahmen.$B$18]" office:value-type="currency" office:currency="EUR" office:value="1596.11904" calcext:value-type="currency">
            <text:p>1.596,12 €</text:p>
          </table:table-cell>
          <table:table-cell table:style-name="ce5" table:formula="of:=[.F3] * ( (10/15) * [$Annahmen.$B$19] + (5/15) * [$Annahmen.$B$20] )" office:value-type="currency" office:currency="EUR" office:value="555.8983344" calcext:value-type="currency">
            <text:p>555,90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3:.I3])+[.T3]" office:value-type="currency" office:currency="EUR" office:value="4666.0173744" calcext:value-type="currency">
            <text:p>4.666,02 €</text:p>
          </table:table-cell>
          <table:table-cell table:style-name="ce14" table:formula="of:=[.J3]/[$Annahmen.$B$14]" office:value-type="percentage" office:value="0.259109754973934" calcext:value-type="percentage">
            <text:p>25,91 %</text:p>
          </table:table-cell>
          <table:table-cell table:style-name="ce5" table:formula="of:=[.J3]" office:value-type="currency" office:currency="EUR" office:value="4666.0173744" calcext:value-type="currency">
            <text:p>4.666,02 €</text:p>
          </table:table-cell>
          <table:table-cell table:style-name="ce5" table:formula="of:=[.J3]/(1+[$Annahmen.$B$39])^[.A3]" office:value-type="currency" office:currency="EUR" office:value="4530.11395572816" calcext:value-type="currency">
            <text:p>4.530,11 €</text:p>
          </table:table-cell>
          <table:table-cell table:formula="of:=IF([.L3]&gt;=[$Annahmen.$B$14];&quot;JA&quot;;&quot;&quot;)">
            <text:p/>
          </table:table-cell>
          <table:table-cell table:style-name="ce1" table:formula="of:=IF([.A3]&lt;=[$Annahmen.$B$36];[$Annahmen.$B$33];0)" office:value-type="float" office:value="12000" calcext:value-type="float">
            <text:p>12.000 kWh</text:p>
          </table:table-cell>
          <table:table-cell table:style-name="ce1" table:formula="of:=MIN([.O3]*[$Annahmen.$B$34];[.C3])" office:value-type="float" office:value="3600" calcext:value-type="float">
            <text:p>3600</text:p>
          </table:table-cell>
          <table:table-cell table:style-name="ce1" table:formula="of:=MAX([.O3]-[.P3];0)" office:value-type="float" office:value="8400" calcext:value-type="float">
            <text:p>8400</text:p>
          </table:table-cell>
          <table:table-cell table:style-name="ce1" table:formula="of:=[.P3]*[$Annahmen.$B$18]" office:value-type="float" office:value="1152" calcext:value-type="float">
            <text:p>1152</text:p>
          </table:table-cell>
          <table:table-cell table:style-name="ce1" table:formula="of:=[.Q3]*[$Annahmen.$B$35]" office:value-type="float" office:value="1512" calcext:value-type="float">
            <text:p>1512</text:p>
          </table:table-cell>
          <table:table-cell table:style-name="ce1" table:formula="of:=SUM([.R3:.S3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table:formula="of:=[.B3]*(1-[$Annahmen.$B$11])" office:value-type="float" office:value="12407.3316" calcext:value-type="float">
            <text:p>12407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4]*[.E4];MAX([.C4]-[.P4];0))" office:value-type="float" office:value="4962.93264" calcext:value-type="float">
            <text:p>4963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4]-[.D4];0)" office:value-type="float" office:value="7444.39896" calcext:value-type="float">
            <text:p>7444</text:p>
          </table:table-cell>
          <table:table-cell table:style-name="ce5" table:formula="of:=[.D4]*[$Annahmen.$B$18]" office:value-type="currency" office:currency="EUR" office:value="1588.1384448" calcext:value-type="currency">
            <text:p>1.588,14 €</text:p>
          </table:table-cell>
          <table:table-cell table:style-name="ce5" table:formula="of:=[.F4] * ( (10/15) * [$Annahmen.$B$19] + (5/15) * [$Annahmen.$B$20] )" office:value-type="currency" office:currency="EUR" office:value="553.118842728" calcext:value-type="currency">
            <text:p>553,12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4:.I4])+[.T4]" office:value-type="currency" office:currency="EUR" office:value="4655.257287528" calcext:value-type="currency">
            <text:p>4.655,26 €</text:p>
          </table:table-cell>
          <table:table-cell table:style-name="ce14" table:formula="of:=[.J4]/[$Annahmen.$B$14]" office:value-type="percentage" office:value="0.258512233951359" calcext:value-type="percentage">
            <text:p>25,85 %</text:p>
          </table:table-cell>
          <table:table-cell table:style-name="ce5" table:formula="of:=[.L3]+[.J4]" office:value-type="currency" office:currency="EUR" office:value="9321.274661928" calcext:value-type="currency">
            <text:p>9.321,27 €</text:p>
          </table:table-cell>
          <table:table-cell table:style-name="ce5" table:formula="of:=[.J4]/(1+[$Annahmen.$B$39])^[.A4]" office:value-type="currency" office:currency="EUR" office:value="4388.02647518899" calcext:value-type="currency">
            <text:p>4.388,03 €</text:p>
          </table:table-cell>
          <table:table-cell table:formula="of:=IF([.L4]&gt;=[$Annahmen.$B$14];&quot;JA&quot;;&quot;&quot;)">
            <text:p/>
          </table:table-cell>
          <table:table-cell table:style-name="ce1" table:formula="of:=IF([.A4]&lt;=[$Annahmen.$B$36];[$Annahmen.$B$33];0)" office:value-type="float" office:value="12000" calcext:value-type="float">
            <text:p>12.000 kWh</text:p>
          </table:table-cell>
          <table:table-cell table:style-name="ce1" table:formula="of:=MIN([.O4]*[$Annahmen.$B$34];[.C4])" office:value-type="float" office:value="3600" calcext:value-type="float">
            <text:p>3600</text:p>
          </table:table-cell>
          <table:table-cell table:style-name="ce1" table:formula="of:=MAX([.O4]-[.P4];0)" office:value-type="float" office:value="8400" calcext:value-type="float">
            <text:p>8400</text:p>
          </table:table-cell>
          <table:table-cell table:style-name="ce1" table:formula="of:=[.P4]*[$Annahmen.$B$18]" office:value-type="float" office:value="1152" calcext:value-type="float">
            <text:p>1152</text:p>
          </table:table-cell>
          <table:table-cell table:style-name="ce1" table:formula="of:=[.Q4]*[$Annahmen.$B$35]" office:value-type="float" office:value="1512" calcext:value-type="float">
            <text:p>1512</text:p>
          </table:table-cell>
          <table:table-cell table:style-name="ce1" table:formula="of:=SUM([.R4:.S4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table:formula="of:=[.B4]*(1-[$Annahmen.$B$11])" office:value-type="float" office:value="12345.294942" calcext:value-type="float">
            <text:p>12345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5]*[.E5];MAX([.C5]-[.P5];0))" office:value-type="float" office:value="4938.1179768" calcext:value-type="float">
            <text:p>4938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5]-[.D5];0)" office:value-type="float" office:value="7407.1769652" calcext:value-type="float">
            <text:p>7407</text:p>
          </table:table-cell>
          <table:table-cell table:style-name="ce5" table:formula="of:=[.D5]*[$Annahmen.$B$18]" office:value-type="currency" office:currency="EUR" office:value="1580.197752576" calcext:value-type="currency">
            <text:p>1.580,20 €</text:p>
          </table:table-cell>
          <table:table-cell table:style-name="ce5" table:formula="of:=[.F5] * ( (10/15) * [$Annahmen.$B$19] + (5/15) * [$Annahmen.$B$20] )" office:value-type="currency" office:currency="EUR" office:value="550.35324851436" calcext:value-type="currency">
            <text:p>550,35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5:.I5])+[.T5]" office:value-type="currency" office:currency="EUR" office:value="4644.55100109036" calcext:value-type="currency">
            <text:p>4.644,55 €</text:p>
          </table:table-cell>
          <table:table-cell table:style-name="ce14" table:formula="of:=[.J5]/[$Annahmen.$B$14]" office:value-type="percentage" office:value="0.257917700533897" calcext:value-type="percentage">
            <text:p>25,79 %</text:p>
          </table:table-cell>
          <table:table-cell table:style-name="ce5" table:formula="of:=[.L4]+[.J5]" office:value-type="currency" office:currency="EUR" office:value="13965.8256630184" calcext:value-type="currency">
            <text:p>13.965,83 €</text:p>
          </table:table-cell>
          <table:table-cell table:style-name="ce5" table:formula="of:=[.J5]/(1+[$Annahmen.$B$39])^[.A5]" office:value-type="currency" office:currency="EUR" office:value="4250.42211008821" calcext:value-type="currency">
            <text:p>4.250,42 €</text:p>
          </table:table-cell>
          <table:table-cell table:formula="of:=IF([.L5]&gt;=[$Annahmen.$B$14];&quot;JA&quot;;&quot;&quot;)">
            <text:p/>
          </table:table-cell>
          <table:table-cell table:style-name="ce1" table:formula="of:=IF([.A5]&lt;=[$Annahmen.$B$36];[$Annahmen.$B$33];0)" office:value-type="float" office:value="12000" calcext:value-type="float">
            <text:p>12.000 kWh</text:p>
          </table:table-cell>
          <table:table-cell table:style-name="ce1" table:formula="of:=MIN([.O5]*[$Annahmen.$B$34];[.C5])" office:value-type="float" office:value="3600" calcext:value-type="float">
            <text:p>3600</text:p>
          </table:table-cell>
          <table:table-cell table:style-name="ce1" table:formula="of:=MAX([.O5]-[.P5];0)" office:value-type="float" office:value="8400" calcext:value-type="float">
            <text:p>8400</text:p>
          </table:table-cell>
          <table:table-cell table:style-name="ce1" table:formula="of:=[.P5]*[$Annahmen.$B$18]" office:value-type="float" office:value="1152" calcext:value-type="float">
            <text:p>1152</text:p>
          </table:table-cell>
          <table:table-cell table:style-name="ce1" table:formula="of:=[.Q5]*[$Annahmen.$B$35]" office:value-type="float" office:value="1512" calcext:value-type="float">
            <text:p>1512</text:p>
          </table:table-cell>
          <table:table-cell table:style-name="ce1" table:formula="of:=SUM([.R5:.S5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table:formula="of:=[.B5]*(1-[$Annahmen.$B$11])" office:value-type="float" office:value="12283.56846729" calcext:value-type="float">
            <text:p>12284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6]*[.E6];MAX([.C6]-[.P6];0))" office:value-type="float" office:value="4913.427386916" calcext:value-type="float">
            <text:p>4913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6]-[.D6];0)" office:value-type="float" office:value="7370.141080374" calcext:value-type="float">
            <text:p>7370</text:p>
          </table:table-cell>
          <table:table-cell table:style-name="ce5" table:formula="of:=[.D6]*[$Annahmen.$B$18]" office:value-type="currency" office:currency="EUR" office:value="1572.29676381312" calcext:value-type="currency">
            <text:p>1.572,30 €</text:p>
          </table:table-cell>
          <table:table-cell table:style-name="ce5" table:formula="of:=[.F6] * ( (10/15) * [$Annahmen.$B$19] + (5/15) * [$Annahmen.$B$20] )" office:value-type="currency" office:currency="EUR" office:value="547.601482271788" calcext:value-type="currency">
            <text:p>547,60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6:.I6])+[.T6]" office:value-type="currency" office:currency="EUR" office:value="4633.89824608491" calcext:value-type="currency">
            <text:p>4.633,90 €</text:p>
          </table:table-cell>
          <table:table-cell table:style-name="ce14" table:formula="of:=[.J6]/[$Annahmen.$B$14]" office:value-type="percentage" office:value="0.257326139783523" calcext:value-type="percentage">
            <text:p>25,73 %</text:p>
          </table:table-cell>
          <table:table-cell table:style-name="ce5" table:formula="of:=[.L5]+[.J6]" office:value-type="currency" office:currency="EUR" office:value="18599.7239091033" calcext:value-type="currency">
            <text:p>18.599,72 €</text:p>
          </table:table-cell>
          <table:table-cell table:style-name="ce5" table:formula="of:=[.J6]/(1+[$Annahmen.$B$39])^[.A6]" office:value-type="currency" office:currency="EUR" office:value="4117.15857300567" calcext:value-type="currency">
            <text:p>4.117,16 €</text:p>
          </table:table-cell>
          <table:table-cell table:formula="of:=IF([.L6]&gt;=[$Annahmen.$B$14];&quot;JA&quot;;&quot;&quot;)" office:value-type="string" office:string-value="JA" calcext:value-type="string">
            <text:p>JA</text:p>
          </table:table-cell>
          <table:table-cell table:style-name="ce1" table:formula="of:=IF([.A6]&lt;=[$Annahmen.$B$36];[$Annahmen.$B$33];0)" office:value-type="float" office:value="12000" calcext:value-type="float">
            <text:p>12.000 kWh</text:p>
          </table:table-cell>
          <table:table-cell table:style-name="ce1" table:formula="of:=MIN([.O6]*[$Annahmen.$B$34];[.C6])" office:value-type="float" office:value="3600" calcext:value-type="float">
            <text:p>3600</text:p>
          </table:table-cell>
          <table:table-cell table:style-name="ce1" table:formula="of:=MAX([.O6]-[.P6];0)" office:value-type="float" office:value="8400" calcext:value-type="float">
            <text:p>8400</text:p>
          </table:table-cell>
          <table:table-cell table:style-name="ce1" table:formula="of:=[.P6]*[$Annahmen.$B$18]" office:value-type="float" office:value="1152" calcext:value-type="float">
            <text:p>1152</text:p>
          </table:table-cell>
          <table:table-cell table:style-name="ce1" table:formula="of:=[.Q6]*[$Annahmen.$B$35]" office:value-type="float" office:value="1512" calcext:value-type="float">
            <text:p>1512</text:p>
          </table:table-cell>
          <table:table-cell table:style-name="ce1" table:formula="of:=SUM([.R6:.S6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table:formula="of:=[.B6]*(1-[$Annahmen.$B$11])" office:value-type="float" office:value="12222.1506249535" calcext:value-type="float">
            <text:p>12222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7]*[.E7];MAX([.C7]-[.P7];0))" office:value-type="float" office:value="4888.86024998142" calcext:value-type="float">
            <text:p>4889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7]-[.D7];0)" office:value-type="float" office:value="7333.29037497213" calcext:value-type="float">
            <text:p>7333</text:p>
          </table:table-cell>
          <table:table-cell table:style-name="ce5" table:formula="of:=[.D7]*[$Annahmen.$B$18]" office:value-type="currency" office:currency="EUR" office:value="1564.43527999405" calcext:value-type="currency">
            <text:p>1.564,44 €</text:p>
          </table:table-cell>
          <table:table-cell table:style-name="ce5" table:formula="of:=[.F7] * ( (10/15) * [$Annahmen.$B$19] + (5/15) * [$Annahmen.$B$20] )" office:value-type="currency" office:currency="EUR" office:value="544.863474860429" calcext:value-type="currency">
            <text:p>544,8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7:.I7])+[.T7]" office:value-type="currency" office:currency="EUR" office:value="4623.29875485448" calcext:value-type="currency">
            <text:p>4.623,30 €</text:p>
          </table:table-cell>
          <table:table-cell table:style-name="ce14" table:formula="of:=[.J7]/[$Annahmen.$B$14]" office:value-type="percentage" office:value="0.256737536836901" calcext:value-type="percentage">
            <text:p>25,67 %</text:p>
          </table:table-cell>
          <table:table-cell table:style-name="ce5" table:formula="of:=[.L6]+[.J7]" office:value-type="currency" office:currency="EUR" office:value="23223.0226639578" calcext:value-type="currency">
            <text:p>23.223,02 €</text:p>
          </table:table-cell>
          <table:table-cell table:style-name="ce5" table:formula="of:=[.J7]/(1+[$Annahmen.$B$39])^[.A7]" office:value-type="currency" office:currency="EUR" office:value="3988.09811876985" calcext:value-type="currency">
            <text:p>3.988,10 €</text:p>
          </table:table-cell>
          <table:table-cell table:formula="of:=IF([.L7]&gt;=[$Annahmen.$B$14];&quot;JA&quot;;&quot;&quot;)" office:value-type="string" office:string-value="JA" calcext:value-type="string">
            <text:p>JA</text:p>
          </table:table-cell>
          <table:table-cell table:style-name="ce1" table:formula="of:=IF([.A7]&lt;=[$Annahmen.$B$36];[$Annahmen.$B$33];0)" office:value-type="float" office:value="12000" calcext:value-type="float">
            <text:p>12.000 kWh</text:p>
          </table:table-cell>
          <table:table-cell table:style-name="ce1" table:formula="of:=MIN([.O7]*[$Annahmen.$B$34];[.C7])" office:value-type="float" office:value="3600" calcext:value-type="float">
            <text:p>3600</text:p>
          </table:table-cell>
          <table:table-cell table:style-name="ce1" table:formula="of:=MAX([.O7]-[.P7];0)" office:value-type="float" office:value="8400" calcext:value-type="float">
            <text:p>8400</text:p>
          </table:table-cell>
          <table:table-cell table:style-name="ce1" table:formula="of:=[.P7]*[$Annahmen.$B$18]" office:value-type="float" office:value="1152" calcext:value-type="float">
            <text:p>1152</text:p>
          </table:table-cell>
          <table:table-cell table:style-name="ce1" table:formula="of:=[.Q7]*[$Annahmen.$B$35]" office:value-type="float" office:value="1512" calcext:value-type="float">
            <text:p>1512</text:p>
          </table:table-cell>
          <table:table-cell table:style-name="ce1" table:formula="of:=SUM([.R7:.S7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table:formula="of:=[.B7]*(1-[$Annahmen.$B$11])" office:value-type="float" office:value="12161.0398718288" calcext:value-type="float">
            <text:p>12161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8]*[.E8];MAX([.C8]-[.P8];0))" office:value-type="float" office:value="4256.36395514007" calcext:value-type="float">
            <text:p>4256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8]-[.D8];0)" office:value-type="float" office:value="7904.67591668871" calcext:value-type="float">
            <text:p>7905</text:p>
          </table:table-cell>
          <table:table-cell table:style-name="ce5" table:formula="of:=[.D8]*[$Annahmen.$B$18]" office:value-type="currency" office:currency="EUR" office:value="1362.03646564482" calcext:value-type="currency">
            <text:p>1.362,04 €</text:p>
          </table:table-cell>
          <table:table-cell table:style-name="ce5" table:formula="of:=[.F8] * ( (10/15) * [$Annahmen.$B$19] + (5/15) * [$Annahmen.$B$20] )" office:value-type="currency" office:currency="EUR" office:value="587.317420609971" calcext:value-type="currency">
            <text:p>587,32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8:.I8])+[.T8]" office:value-type="currency" office:currency="EUR" office:value="4463.35388625479" calcext:value-type="currency">
            <text:p>4.463,35 €</text:p>
          </table:table-cell>
          <table:table-cell table:style-name="ce14" table:formula="of:=[.J8]/[$Annahmen.$B$14]" office:value-type="percentage" office:value="0.247855599118541" calcext:value-type="percentage">
            <text:p>24,79 %</text:p>
          </table:table-cell>
          <table:table-cell table:style-name="ce5" table:formula="of:=[.L7]+[.J8]" office:value-type="currency" office:currency="EUR" office:value="27686.3765502125" calcext:value-type="currency">
            <text:p>27.686,38 €</text:p>
          </table:table-cell>
          <table:table-cell table:style-name="ce5" table:formula="of:=[.J8]/(1+[$Annahmen.$B$39])^[.A8]" office:value-type="currency" office:currency="EUR" office:value="3737.9886117462" calcext:value-type="currency">
            <text:p>3.737,99 €</text:p>
          </table:table-cell>
          <table:table-cell table:formula="of:=IF([.L8]&gt;=[$Annahmen.$B$14];&quot;JA&quot;;&quot;&quot;)" office:value-type="string" office:string-value="JA" calcext:value-type="string">
            <text:p>JA</text:p>
          </table:table-cell>
          <table:table-cell table:style-name="ce1" table:formula="of:=IF([.A8]&lt;=[$Annahmen.$B$36];[$Annahmen.$B$33];0)" office:value-type="float" office:value="12000" calcext:value-type="float">
            <text:p>12.000 kWh</text:p>
          </table:table-cell>
          <table:table-cell table:style-name="ce1" table:formula="of:=MIN([.O8]*[$Annahmen.$B$34];[.C8])" office:value-type="float" office:value="3600" calcext:value-type="float">
            <text:p>3600</text:p>
          </table:table-cell>
          <table:table-cell table:style-name="ce1" table:formula="of:=MAX([.O8]-[.P8];0)" office:value-type="float" office:value="8400" calcext:value-type="float">
            <text:p>8400</text:p>
          </table:table-cell>
          <table:table-cell table:style-name="ce1" table:formula="of:=[.P8]*[$Annahmen.$B$18]" office:value-type="float" office:value="1152" calcext:value-type="float">
            <text:p>1152</text:p>
          </table:table-cell>
          <table:table-cell table:style-name="ce1" table:formula="of:=[.Q8]*[$Annahmen.$B$35]" office:value-type="float" office:value="1512" calcext:value-type="float">
            <text:p>1512</text:p>
          </table:table-cell>
          <table:table-cell table:style-name="ce1" table:formula="of:=SUM([.R8:.S8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table:formula="of:=[.B8]*(1-[$Annahmen.$B$11])" office:value-type="float" office:value="12100.2346724696" calcext:value-type="float">
            <text:p>1210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9]*[.E9];MAX([.C9]-[.P9];0))" office:value-type="float" office:value="4235.08213536437" calcext:value-type="float">
            <text:p>4235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9]-[.D9];0)" office:value-type="float" office:value="7865.15253710526" calcext:value-type="float">
            <text:p>7865</text:p>
          </table:table-cell>
          <table:table-cell table:style-name="ce5" table:formula="of:=[.D9]*[$Annahmen.$B$18]" office:value-type="currency" office:currency="EUR" office:value="1355.2262833166" calcext:value-type="currency">
            <text:p>1.355,23 €</text:p>
          </table:table-cell>
          <table:table-cell table:style-name="ce5" table:formula="of:=[.F9] * ( (10/15) * [$Annahmen.$B$19] + (5/15) * [$Annahmen.$B$20] )" office:value-type="currency" office:currency="EUR" office:value="584.380833506921" calcext:value-type="currency">
            <text:p>584,38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9:.I9])+[.T9]" office:value-type="currency" office:currency="EUR" office:value="4453.60711682352" calcext:value-type="currency">
            <text:p>4.453,61 €</text:p>
          </table:table-cell>
          <table:table-cell table:style-name="ce14" table:formula="of:=[.J9]/[$Annahmen.$B$14]" office:value-type="percentage" office:value="0.247314348875244" calcext:value-type="percentage">
            <text:p>24,73 %</text:p>
          </table:table-cell>
          <table:table-cell table:style-name="ce5" table:formula="of:=[.L8]+[.J9]" office:value-type="currency" office:currency="EUR" office:value="32139.9836670361" calcext:value-type="currency">
            <text:p>32.139,98 €</text:p>
          </table:table-cell>
          <table:table-cell table:style-name="ce5" table:formula="of:=[.J9]/(1+[$Annahmen.$B$39])^[.A9]" office:value-type="currency" office:currency="EUR" office:value="3621.19014154755" calcext:value-type="currency">
            <text:p>3.621,19 €</text:p>
          </table:table-cell>
          <table:table-cell table:formula="of:=IF([.L9]&gt;=[$Annahmen.$B$14];&quot;JA&quot;;&quot;&quot;)" office:value-type="string" office:string-value="JA" calcext:value-type="string">
            <text:p>JA</text:p>
          </table:table-cell>
          <table:table-cell table:style-name="ce1" table:formula="of:=IF([.A9]&lt;=[$Annahmen.$B$36];[$Annahmen.$B$33];0)" office:value-type="float" office:value="12000" calcext:value-type="float">
            <text:p>12.000 kWh</text:p>
          </table:table-cell>
          <table:table-cell table:style-name="ce1" table:formula="of:=MIN([.O9]*[$Annahmen.$B$34];[.C9])" office:value-type="float" office:value="3600" calcext:value-type="float">
            <text:p>3600</text:p>
          </table:table-cell>
          <table:table-cell table:style-name="ce1" table:formula="of:=MAX([.O9]-[.P9];0)" office:value-type="float" office:value="8400" calcext:value-type="float">
            <text:p>8400</text:p>
          </table:table-cell>
          <table:table-cell table:style-name="ce1" table:formula="of:=[.P9]*[$Annahmen.$B$18]" office:value-type="float" office:value="1152" calcext:value-type="float">
            <text:p>1152</text:p>
          </table:table-cell>
          <table:table-cell table:style-name="ce1" table:formula="of:=[.Q9]*[$Annahmen.$B$35]" office:value-type="float" office:value="1512" calcext:value-type="float">
            <text:p>1512</text:p>
          </table:table-cell>
          <table:table-cell table:style-name="ce1" table:formula="of:=SUM([.R9:.S9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table:formula="of:=[.B9]*(1-[$Annahmen.$B$11])" office:value-type="float" office:value="12039.7334991073" calcext:value-type="float">
            <text:p>1204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10]*[.E10];MAX([.C10]-[.P10];0))" office:value-type="float" office:value="4213.90672468755" calcext:value-type="float">
            <text:p>4214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10]-[.D10];0)" office:value-type="float" office:value="7825.82677441974" calcext:value-type="float">
            <text:p>7826</text:p>
          </table:table-cell>
          <table:table-cell table:style-name="ce5" table:formula="of:=[.D10]*[$Annahmen.$B$18]" office:value-type="currency" office:currency="EUR" office:value="1348.45015190002" calcext:value-type="currency">
            <text:p>1.348,45 €</text:p>
          </table:table-cell>
          <table:table-cell table:style-name="ce5" table:formula="of:=[.F10] * ( (10/15) * [$Annahmen.$B$19] + (5/15) * [$Annahmen.$B$20] )" office:value-type="currency" office:currency="EUR" office:value="581.458929339386" calcext:value-type="currency">
            <text:p>581,4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0:.I10])+[.T10]" office:value-type="currency" office:currency="EUR" office:value="1779.9090812394" calcext:value-type="currency">
            <text:p>1.779,91 €</text:p>
          </table:table-cell>
          <table:table-cell table:style-name="ce14" table:formula="of:=[.J10]/[$Annahmen.$B$14]" office:value-type="percentage" office:value="0.0988405676425766" calcext:value-type="percentage">
            <text:p>9,88 %</text:p>
          </table:table-cell>
          <table:table-cell table:style-name="ce5" table:formula="of:=[.L9]+[.J10]" office:value-type="currency" office:currency="EUR" office:value="33919.8927482755" calcext:value-type="currency">
            <text:p>33.919,89 €</text:p>
          </table:table-cell>
          <table:table-cell table:style-name="ce5" table:formula="of:=[.J10]/(1+[$Annahmen.$B$39])^[.A10]" office:value-type="currency" office:currency="EUR" office:value="1405.07666496962" calcext:value-type="currency">
            <text:p>1.405,08 €</text:p>
          </table:table-cell>
          <table:table-cell table:formula="of:=IF([.L10]&gt;=[$Annahmen.$B$14];&quot;JA&quot;;&quot;&quot;)" office:value-type="string" office:string-value="JA" calcext:value-type="string">
            <text:p>JA</text:p>
          </table:table-cell>
          <table:table-cell table:style-name="ce1" table:formula="of:=IF([.A10]&lt;=[$Annahmen.$B$36];[$Annahmen.$B$33];0)" office:value-type="float" office:value="0" calcext:value-type="float">
            <text:p>0</text:p>
          </table:table-cell>
          <table:table-cell table:style-name="ce1" table:formula="of:=MIN([.O10]*[$Annahmen.$B$34];[.C10])" office:value-type="float" office:value="0" calcext:value-type="float">
            <text:p>0</text:p>
          </table:table-cell>
          <table:table-cell table:style-name="ce1" table:formula="of:=MAX([.O10]-[.P10];0)" office:value-type="float" office:value="0" calcext:value-type="float">
            <text:p>0</text:p>
          </table:table-cell>
          <table:table-cell table:style-name="ce1" table:formula="of:=[.P10]*[$Annahmen.$B$18]" office:value-type="float" office:value="0" calcext:value-type="float">
            <text:p>0</text:p>
          </table:table-cell>
          <table:table-cell table:style-name="ce1" table:formula="of:=[.Q10]*[$Annahmen.$B$35]" office:value-type="float" office:value="0" calcext:value-type="float">
            <text:p>0</text:p>
          </table:table-cell>
          <table:table-cell table:style-name="ce1" table:formula="of:=SUM([.R10:.S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table:formula="of:=[.B10]*(1-[$Annahmen.$B$11])" office:value-type="float" office:value="11979.5348316118" calcext:value-type="float">
            <text:p>1198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11]*[.E11];MAX([.C11]-[.P11];0))" office:value-type="float" office:value="4192.83719106411" calcext:value-type="float">
            <text:p>4193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11]-[.D11];0)" office:value-type="float" office:value="7786.69764054764" calcext:value-type="float">
            <text:p>7787</text:p>
          </table:table-cell>
          <table:table-cell table:style-name="ce5" table:formula="of:=[.D11]*[$Annahmen.$B$18]" office:value-type="currency" office:currency="EUR" office:value="1341.70790114052" calcext:value-type="currency">
            <text:p>1.341,71 €</text:p>
          </table:table-cell>
          <table:table-cell table:style-name="ce5" table:formula="of:=[.F11] * ( (10/15) * [$Annahmen.$B$19] + (5/15) * [$Annahmen.$B$20] )" office:value-type="currency" office:currency="EUR" office:value="578.551634692689" calcext:value-type="currency">
            <text:p>578,55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1:.I11])+[.T11]" office:value-type="currency" office:currency="EUR" office:value="1770.25953583321" calcext:value-type="currency">
            <text:p>1.770,26 €</text:p>
          </table:table-cell>
          <table:table-cell table:style-name="ce14" table:formula="of:=[.J11]/[$Annahmen.$B$14]" office:value-type="percentage" office:value="0.0983047163704559" calcext:value-type="percentage">
            <text:p>9,83 %</text:p>
          </table:table-cell>
          <table:table-cell table:style-name="ce5" table:formula="of:=[.L10]+[.J11]" office:value-type="currency" office:currency="EUR" office:value="35690.1522841087" calcext:value-type="currency">
            <text:p>35.690,15 €</text:p>
          </table:table-cell>
          <table:table-cell table:style-name="ce5" table:formula="of:=[.J11]/(1+[$Annahmen.$B$39])^[.A11]" office:value-type="currency" office:currency="EUR" office:value="1356.75652885343" calcext:value-type="currency">
            <text:p>1.356,76 €</text:p>
          </table:table-cell>
          <table:table-cell table:formula="of:=IF([.L11]&gt;=[$Annahmen.$B$14];&quot;JA&quot;;&quot;&quot;)" office:value-type="string" office:string-value="JA" calcext:value-type="string">
            <text:p>JA</text:p>
          </table:table-cell>
          <table:table-cell table:style-name="ce1" table:formula="of:=IF([.A11]&lt;=[$Annahmen.$B$36];[$Annahmen.$B$33];0)" office:value-type="float" office:value="0" calcext:value-type="float">
            <text:p>0</text:p>
          </table:table-cell>
          <table:table-cell table:style-name="ce1" table:formula="of:=MIN([.O11]*[$Annahmen.$B$34];[.C11])" office:value-type="float" office:value="0" calcext:value-type="float">
            <text:p>0</text:p>
          </table:table-cell>
          <table:table-cell table:style-name="ce1" table:formula="of:=MAX([.O11]-[.P11];0)" office:value-type="float" office:value="0" calcext:value-type="float">
            <text:p>0</text:p>
          </table:table-cell>
          <table:table-cell table:style-name="ce1" table:formula="of:=[.P11]*[$Annahmen.$B$18]" office:value-type="float" office:value="0" calcext:value-type="float">
            <text:p>0</text:p>
          </table:table-cell>
          <table:table-cell table:style-name="ce1" table:formula="of:=[.Q11]*[$Annahmen.$B$35]" office:value-type="float" office:value="0" calcext:value-type="float">
            <text:p>0</text:p>
          </table:table-cell>
          <table:table-cell table:style-name="ce1" table:formula="of:=SUM([.R11:.S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table:formula="of:=[.B11]*(1-[$Annahmen.$B$11])" office:value-type="float" office:value="11919.6371574537" calcext:value-type="float">
            <text:p>1192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12]*[.E12];MAX([.C12]-[.P12];0))" office:value-type="float" office:value="4171.87300510879" calcext:value-type="float">
            <text:p>4172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12]-[.D12];0)" office:value-type="float" office:value="7747.7641523449" calcext:value-type="float">
            <text:p>7748</text:p>
          </table:table-cell>
          <table:table-cell table:style-name="ce5" table:formula="of:=[.D12]*[$Annahmen.$B$18]" office:value-type="currency" office:currency="EUR" office:value="1334.99936163481" calcext:value-type="currency">
            <text:p>1.335,00 €</text:p>
          </table:table-cell>
          <table:table-cell table:style-name="ce5" table:formula="of:=[.F12] * ( (10/15) * [$Annahmen.$B$19] + (5/15) * [$Annahmen.$B$20] )" office:value-type="currency" office:currency="EUR" office:value="575.658876519226" calcext:value-type="currency">
            <text:p>575,6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2:.I12])+[.T12]" office:value-type="currency" office:currency="EUR" office:value="1760.65823815404" calcext:value-type="currency">
            <text:p>1.760,66 €</text:p>
          </table:table-cell>
          <table:table-cell table:style-name="ce14" table:formula="of:=[.J12]/[$Annahmen.$B$14]" office:value-type="percentage" office:value="0.0977715443546958" calcext:value-type="percentage">
            <text:p>9,78 %</text:p>
          </table:table-cell>
          <table:table-cell table:style-name="ce5" table:formula="of:=[.L11]+[.J12]" office:value-type="currency" office:currency="EUR" office:value="37450.8105222627" calcext:value-type="currency">
            <text:p>37.450,81 €</text:p>
          </table:table-cell>
          <table:table-cell table:style-name="ce5" table:formula="of:=[.J12]/(1+[$Annahmen.$B$39])^[.A12]" office:value-type="currency" office:currency="EUR" office:value="1310.09508122321" calcext:value-type="currency">
            <text:p>1.310,10 €</text:p>
          </table:table-cell>
          <table:table-cell table:formula="of:=IF([.L12]&gt;=[$Annahmen.$B$14];&quot;JA&quot;;&quot;&quot;)" office:value-type="string" office:string-value="JA" calcext:value-type="string">
            <text:p>JA</text:p>
          </table:table-cell>
          <table:table-cell table:style-name="ce1" table:formula="of:=IF([.A12]&lt;=[$Annahmen.$B$36];[$Annahmen.$B$33];0)" office:value-type="float" office:value="0" calcext:value-type="float">
            <text:p>0</text:p>
          </table:table-cell>
          <table:table-cell table:style-name="ce1" table:formula="of:=MIN([.O12]*[$Annahmen.$B$34];[.C12])" office:value-type="float" office:value="0" calcext:value-type="float">
            <text:p>0</text:p>
          </table:table-cell>
          <table:table-cell table:style-name="ce1" table:formula="of:=MAX([.O12]-[.P12];0)" office:value-type="float" office:value="0" calcext:value-type="float">
            <text:p>0</text:p>
          </table:table-cell>
          <table:table-cell table:style-name="ce1" table:formula="of:=[.P12]*[$Annahmen.$B$18]" office:value-type="float" office:value="0" calcext:value-type="float">
            <text:p>0</text:p>
          </table:table-cell>
          <table:table-cell table:style-name="ce1" table:formula="of:=[.Q12]*[$Annahmen.$B$35]" office:value-type="float" office:value="0" calcext:value-type="float">
            <text:p>0</text:p>
          </table:table-cell>
          <table:table-cell table:style-name="ce1" table:formula="of:=SUM([.R12:.S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table:formula="of:=[.B12]*(1-[$Annahmen.$B$11])" office:value-type="float" office:value="11860.0389716664" calcext:value-type="float">
            <text:p>11860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3]*[.E13];MAX([.C13]-[.P13];0))" office:value-type="float" office:value="3558.01169149993" calcext:value-type="float">
            <text:p>3558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3]-[.D13];0)" office:value-type="float" office:value="8302.0272801665" calcext:value-type="float">
            <text:p>8302</text:p>
          </table:table-cell>
          <table:table-cell table:style-name="ce5" table:formula="of:=[.D13]*[$Annahmen.$B$18]" office:value-type="currency" office:currency="EUR" office:value="1138.56374127998" calcext:value-type="currency">
            <text:p>1.138,56 €</text:p>
          </table:table-cell>
          <table:table-cell table:style-name="ce5" table:formula="of:=[.F13] * ( (10/15) * [$Annahmen.$B$19] + (5/15) * [$Annahmen.$B$20] )" office:value-type="currency" office:currency="EUR" office:value="616.840626916371" calcext:value-type="currency">
            <text:p>616,84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3:.I13])+[.T13]" office:value-type="currency" office:currency="EUR" office:value="1605.40436819635" calcext:value-type="currency">
            <text:p>1.605,40 €</text:p>
          </table:table-cell>
          <table:table-cell table:style-name="ce14" table:formula="of:=[.J13]/[$Annahmen.$B$14]" office:value-type="percentage" office:value="0.089150103632207" calcext:value-type="percentage">
            <text:p>8,92 %</text:p>
          </table:table-cell>
          <table:table-cell table:style-name="ce5" table:formula="of:=[.L12]+[.J13]" office:value-type="currency" office:currency="EUR" office:value="39056.2148904591" calcext:value-type="currency">
            <text:p>39.056,21 €</text:p>
          </table:table-cell>
          <table:table-cell table:style-name="ce5" table:formula="of:=[.J13]/(1+[$Annahmen.$B$39])^[.A13]" office:value-type="currency" office:currency="EUR" office:value="1159.77827312963" calcext:value-type="currency">
            <text:p>1.159,78 €</text:p>
          </table:table-cell>
          <table:table-cell table:formula="of:=IF([.L13]&gt;=[$Annahmen.$B$14];&quot;JA&quot;;&quot;&quot;)" office:value-type="string" office:string-value="JA" calcext:value-type="string">
            <text:p>JA</text:p>
          </table:table-cell>
          <table:table-cell table:style-name="ce1" table:formula="of:=IF([.A13]&lt;=[$Annahmen.$B$36];[$Annahmen.$B$33];0)" office:value-type="float" office:value="0" calcext:value-type="float">
            <text:p>0</text:p>
          </table:table-cell>
          <table:table-cell table:style-name="ce1" table:formula="of:=MIN([.O13]*[$Annahmen.$B$34];[.C13])" office:value-type="float" office:value="0" calcext:value-type="float">
            <text:p>0</text:p>
          </table:table-cell>
          <table:table-cell table:style-name="ce1" table:formula="of:=MAX([.O13]-[.P13];0)" office:value-type="float" office:value="0" calcext:value-type="float">
            <text:p>0</text:p>
          </table:table-cell>
          <table:table-cell table:style-name="ce1" table:formula="of:=[.P13]*[$Annahmen.$B$18]" office:value-type="float" office:value="0" calcext:value-type="float">
            <text:p>0</text:p>
          </table:table-cell>
          <table:table-cell table:style-name="ce1" table:formula="of:=[.Q13]*[$Annahmen.$B$35]" office:value-type="float" office:value="0" calcext:value-type="float">
            <text:p>0</text:p>
          </table:table-cell>
          <table:table-cell table:style-name="ce1" table:formula="of:=SUM([.R13:.S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table:formula="of:=[.B13]*(1-[$Annahmen.$B$11])" office:value-type="float" office:value="11800.7387768081" calcext:value-type="float">
            <text:p>11801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4]*[.E14];MAX([.C14]-[.P14];0))" office:value-type="float" office:value="3540.22163304243" calcext:value-type="float">
            <text:p>3540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4]-[.D14];0)" office:value-type="float" office:value="8260.51714376567" calcext:value-type="float">
            <text:p>8261</text:p>
          </table:table-cell>
          <table:table-cell table:style-name="ce5" table:formula="of:=[.D14]*[$Annahmen.$B$18]" office:value-type="currency" office:currency="EUR" office:value="1132.87092257358" calcext:value-type="currency">
            <text:p>1.132,87 €</text:p>
          </table:table-cell>
          <table:table-cell table:style-name="ce5" table:formula="of:=[.F14] * ( (10/15) * [$Annahmen.$B$19] + (5/15) * [$Annahmen.$B$20] )" office:value-type="currency" office:currency="EUR" office:value="613.756423781789" calcext:value-type="currency">
            <text:p>613,7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4:.I14])+[.T14]" office:value-type="currency" office:currency="EUR" office:value="1596.62734635537" calcext:value-type="currency">
            <text:p>1.596,63 €</text:p>
          </table:table-cell>
          <table:table-cell table:style-name="ce14" table:formula="of:=[.J14]/[$Annahmen.$B$14]" office:value-type="percentage" office:value="0.0886627046801381" calcext:value-type="percentage">
            <text:p>8,87 %</text:p>
          </table:table-cell>
          <table:table-cell table:style-name="ce5" table:formula="of:=[.L13]+[.J14]" office:value-type="currency" office:currency="EUR" office:value="40652.8422368144" calcext:value-type="currency">
            <text:p>40.652,84 €</text:p>
          </table:table-cell>
          <table:table-cell table:style-name="ce5" table:formula="of:=[.J14]/(1+[$Annahmen.$B$39])^[.A14]" office:value-type="currency" office:currency="EUR" office:value="1119.84229689955" calcext:value-type="currency">
            <text:p>1.119,84 €</text:p>
          </table:table-cell>
          <table:table-cell table:formula="of:=IF([.L14]&gt;=[$Annahmen.$B$14];&quot;JA&quot;;&quot;&quot;)" office:value-type="string" office:string-value="JA" calcext:value-type="string">
            <text:p>JA</text:p>
          </table:table-cell>
          <table:table-cell table:style-name="ce1" table:formula="of:=IF([.A14]&lt;=[$Annahmen.$B$36];[$Annahmen.$B$33];0)" office:value-type="float" office:value="0" calcext:value-type="float">
            <text:p>0</text:p>
          </table:table-cell>
          <table:table-cell table:style-name="ce1" table:formula="of:=MIN([.O14]*[$Annahmen.$B$34];[.C14])" office:value-type="float" office:value="0" calcext:value-type="float">
            <text:p>0</text:p>
          </table:table-cell>
          <table:table-cell table:style-name="ce1" table:formula="of:=MAX([.O14]-[.P14];0)" office:value-type="float" office:value="0" calcext:value-type="float">
            <text:p>0</text:p>
          </table:table-cell>
          <table:table-cell table:style-name="ce1" table:formula="of:=[.P14]*[$Annahmen.$B$18]" office:value-type="float" office:value="0" calcext:value-type="float">
            <text:p>0</text:p>
          </table:table-cell>
          <table:table-cell table:style-name="ce1" table:formula="of:=[.Q14]*[$Annahmen.$B$35]" office:value-type="float" office:value="0" calcext:value-type="float">
            <text:p>0</text:p>
          </table:table-cell>
          <table:table-cell table:style-name="ce1" table:formula="of:=SUM([.R14:.S1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table:formula="of:=[.B14]*(1-[$Annahmen.$B$11])" office:value-type="float" office:value="11741.7350829241" calcext:value-type="float">
            <text:p>11742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5]*[.E15];MAX([.C15]-[.P15];0))" office:value-type="float" office:value="3522.52052487722" calcext:value-type="float">
            <text:p>3523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5]-[.D15];0)" office:value-type="float" office:value="8219.21455804684" calcext:value-type="float">
            <text:p>8219</text:p>
          </table:table-cell>
          <table:table-cell table:style-name="ce5" table:formula="of:=[.D15]*[$Annahmen.$B$18]" office:value-type="currency" office:currency="EUR" office:value="1127.20656796071" calcext:value-type="currency">
            <text:p>1.127,21 €</text:p>
          </table:table-cell>
          <table:table-cell table:style-name="ce5" table:formula="of:=[.F15] * ( (10/15) * [$Annahmen.$B$19] + (5/15) * [$Annahmen.$B$20] )" office:value-type="currency" office:currency="EUR" office:value="610.68764166288" calcext:value-type="currency">
            <text:p>610,69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5:.I15])+[.T15]" office:value-type="currency" office:currency="EUR" office:value="1587.89420962359" calcext:value-type="currency">
            <text:p>1.587,89 €</text:p>
          </table:table-cell>
          <table:table-cell table:style-name="ce14" table:formula="of:=[.J15]/[$Annahmen.$B$14]" office:value-type="percentage" office:value="0.0881777427228296" calcext:value-type="percentage">
            <text:p>8,82 %</text:p>
          </table:table-cell>
          <table:table-cell table:style-name="ce5" table:formula="of:=[.L14]+[.J15]" office:value-type="currency" office:currency="EUR" office:value="42240.736446438" calcext:value-type="currency">
            <text:p>42.240,74 €</text:p>
          </table:table-cell>
          <table:table-cell table:style-name="ce5" table:formula="of:=[.J15]/(1+[$Annahmen.$B$39])^[.A15]" office:value-type="currency" office:currency="EUR" office:value="1081.27868981059" calcext:value-type="currency">
            <text:p>1.081,28 €</text:p>
          </table:table-cell>
          <table:table-cell table:formula="of:=IF([.L15]&gt;=[$Annahmen.$B$14];&quot;JA&quot;;&quot;&quot;)" office:value-type="string" office:string-value="JA" calcext:value-type="string">
            <text:p>JA</text:p>
          </table:table-cell>
          <table:table-cell table:style-name="ce1" table:formula="of:=IF([.A15]&lt;=[$Annahmen.$B$36];[$Annahmen.$B$33];0)" office:value-type="float" office:value="0" calcext:value-type="float">
            <text:p>0</text:p>
          </table:table-cell>
          <table:table-cell table:style-name="ce1" table:formula="of:=MIN([.O15]*[$Annahmen.$B$34];[.C15])" office:value-type="float" office:value="0" calcext:value-type="float">
            <text:p>0</text:p>
          </table:table-cell>
          <table:table-cell table:style-name="ce1" table:formula="of:=MAX([.O15]-[.P15];0)" office:value-type="float" office:value="0" calcext:value-type="float">
            <text:p>0</text:p>
          </table:table-cell>
          <table:table-cell table:style-name="ce1" table:formula="of:=[.P15]*[$Annahmen.$B$18]" office:value-type="float" office:value="0" calcext:value-type="float">
            <text:p>0</text:p>
          </table:table-cell>
          <table:table-cell table:style-name="ce1" table:formula="of:=[.Q15]*[$Annahmen.$B$35]" office:value-type="float" office:value="0" calcext:value-type="float">
            <text:p>0</text:p>
          </table:table-cell>
          <table:table-cell table:style-name="ce1" table:formula="of:=SUM([.R15:.S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table:formula="of:=[.B15]*(1-[$Annahmen.$B$11])" office:value-type="float" office:value="11683.0264075094" calcext:value-type="float">
            <text:p>11683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6]*[.E16];MAX([.C16]-[.P16];0))" office:value-type="float" office:value="3504.90792225283" calcext:value-type="float">
            <text:p>3505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6]-[.D16];0)" office:value-type="float" office:value="8178.1184852566" calcext:value-type="float">
            <text:p>8178</text:p>
          </table:table-cell>
          <table:table-cell table:style-name="ce5" table:formula="of:=[.D16]*[$Annahmen.$B$18]" office:value-type="currency" office:currency="EUR" office:value="1121.57053512091" calcext:value-type="currency">
            <text:p>1.121,57 €</text:p>
          </table:table-cell>
          <table:table-cell table:style-name="ce5" table:formula="of:=[.F16] * ( (10/15) * [$Annahmen.$B$19] + (5/15) * [$Annahmen.$B$20] )" office:value-type="currency" office:currency="EUR" office:value="607.634203454565" calcext:value-type="currency">
            <text:p>607,63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6:.I16])+[.T16]" office:value-type="currency" office:currency="EUR" office:value="1579.20473857547" calcext:value-type="currency">
            <text:p>1.579,20 €</text:p>
          </table:table-cell>
          <table:table-cell table:style-name="ce14" table:formula="of:=[.J16]/[$Annahmen.$B$14]" office:value-type="percentage" office:value="0.0876952055753076" calcext:value-type="percentage">
            <text:p>8,77 %</text:p>
          </table:table-cell>
          <table:table-cell table:style-name="ce5" table:formula="of:=[.L15]+[.J16]" office:value-type="currency" office:currency="EUR" office:value="43819.9411850135" calcext:value-type="currency">
            <text:p>43.819,94 €</text:p>
          </table:table-cell>
          <table:table-cell table:style-name="ce5" table:formula="of:=[.J16]/(1+[$Annahmen.$B$39])^[.A16]" office:value-type="currency" office:currency="EUR" office:value="1044.04037170538" calcext:value-type="currency">
            <text:p>1.044,04 €</text:p>
          </table:table-cell>
          <table:table-cell table:formula="of:=IF([.L16]&gt;=[$Annahmen.$B$14];&quot;JA&quot;;&quot;&quot;)" office:value-type="string" office:string-value="JA" calcext:value-type="string">
            <text:p>JA</text:p>
          </table:table-cell>
          <table:table-cell table:style-name="ce1" table:formula="of:=IF([.A16]&lt;=[$Annahmen.$B$36];[$Annahmen.$B$33];0)" office:value-type="float" office:value="0" calcext:value-type="float">
            <text:p>0</text:p>
          </table:table-cell>
          <table:table-cell table:style-name="ce1" table:formula="of:=MIN([.O16]*[$Annahmen.$B$34];[.C16])" office:value-type="float" office:value="0" calcext:value-type="float">
            <text:p>0</text:p>
          </table:table-cell>
          <table:table-cell table:style-name="ce1" table:formula="of:=MAX([.O16]-[.P16];0)" office:value-type="float" office:value="0" calcext:value-type="float">
            <text:p>0</text:p>
          </table:table-cell>
          <table:table-cell table:style-name="ce1" table:formula="of:=[.P16]*[$Annahmen.$B$18]" office:value-type="float" office:value="0" calcext:value-type="float">
            <text:p>0</text:p>
          </table:table-cell>
          <table:table-cell table:style-name="ce1" table:formula="of:=[.Q16]*[$Annahmen.$B$35]" office:value-type="float" office:value="0" calcext:value-type="float">
            <text:p>0</text:p>
          </table:table-cell>
          <table:table-cell table:style-name="ce1" table:formula="of:=SUM([.R16:.S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table:formula="of:=[.B16]*(1-[$Annahmen.$B$11])" office:value-type="float" office:value="11624.6112754719" calcext:value-type="float">
            <text:p>11625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7]*[.E17];MAX([.C17]-[.P17];0))" office:value-type="float" office:value="3487.38338264157" calcext:value-type="float">
            <text:p>3487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7]-[.D17];0)" office:value-type="float" office:value="8137.22789283032" calcext:value-type="float">
            <text:p>8137</text:p>
          </table:table-cell>
          <table:table-cell table:style-name="ce5" table:formula="of:=[.D17]*[$Annahmen.$B$18]" office:value-type="currency" office:currency="EUR" office:value="1115.9626824453" calcext:value-type="currency">
            <text:p>1.115,96 €</text:p>
          </table:table-cell>
          <table:table-cell table:style-name="ce5" table:formula="of:=[.F17] * ( (10/15) * [$Annahmen.$B$19] + (5/15) * [$Annahmen.$B$20] )" office:value-type="currency" office:currency="EUR" office:value="604.596032437293" calcext:value-type="currency">
            <text:p>604,60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7:.I17])+[.T17]" office:value-type="currency" office:currency="EUR" office:value="1570.55871488259" calcext:value-type="currency">
            <text:p>1.570,56 €</text:p>
          </table:table-cell>
          <table:table-cell table:style-name="ce14" table:formula="of:=[.J17]/[$Annahmen.$B$14]" office:value-type="percentage" office:value="0.0872150811135233" calcext:value-type="percentage">
            <text:p>8,72 %</text:p>
          </table:table-cell>
          <table:table-cell table:style-name="ce5" table:formula="of:=[.L16]+[.J17]" office:value-type="currency" office:currency="EUR" office:value="45390.4998998961" calcext:value-type="currency">
            <text:p>45.390,50 €</text:p>
          </table:table-cell>
          <table:table-cell table:style-name="ce5" table:formula="of:=[.J17]/(1+[$Annahmen.$B$39])^[.A17]" office:value-type="currency" office:currency="EUR" office:value="1008.08187523543" calcext:value-type="currency">
            <text:p>1.008,08 €</text:p>
          </table:table-cell>
          <table:table-cell table:formula="of:=IF([.L17]&gt;=[$Annahmen.$B$14];&quot;JA&quot;;&quot;&quot;)" office:value-type="string" office:string-value="JA" calcext:value-type="string">
            <text:p>JA</text:p>
          </table:table-cell>
          <table:table-cell table:style-name="ce1" table:formula="of:=IF([.A17]&lt;=[$Annahmen.$B$36];[$Annahmen.$B$33];0)" office:value-type="float" office:value="0" calcext:value-type="float">
            <text:p>0</text:p>
          </table:table-cell>
          <table:table-cell table:style-name="ce1" table:formula="of:=MIN([.O17]*[$Annahmen.$B$34];[.C17])" office:value-type="float" office:value="0" calcext:value-type="float">
            <text:p>0</text:p>
          </table:table-cell>
          <table:table-cell table:style-name="ce1" table:formula="of:=MAX([.O17]-[.P17];0)" office:value-type="float" office:value="0" calcext:value-type="float">
            <text:p>0</text:p>
          </table:table-cell>
          <table:table-cell table:style-name="ce1" table:formula="of:=[.P17]*[$Annahmen.$B$18]" office:value-type="float" office:value="0" calcext:value-type="float">
            <text:p>0</text:p>
          </table:table-cell>
          <table:table-cell table:style-name="ce1" table:formula="of:=[.Q17]*[$Annahmen.$B$35]" office:value-type="float" office:value="0" calcext:value-type="float">
            <text:p>0</text:p>
          </table:table-cell>
          <table:table-cell table:style-name="ce1" table:formula="of:=SUM([.R17:.S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table:formula="of:=[.B17]*(1-[$Annahmen.$B$11])" office:value-type="float" office:value="11566.4882190945" calcext:value-type="float">
            <text:p>11566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8]*[.E18];MAX([.C18]-[.P18];0))" office:value-type="float" office:value="3469.94646572836" calcext:value-type="float">
            <text:p>3470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8]-[.D18];0)" office:value-type="float" office:value="8096.54175336617" calcext:value-type="float">
            <text:p>8097</text:p>
          </table:table-cell>
          <table:table-cell table:style-name="ce5" table:formula="of:=[.D18]*[$Annahmen.$B$18]" office:value-type="currency" office:currency="EUR" office:value="1110.38286903307" calcext:value-type="currency">
            <text:p>1.110,38 €</text:p>
          </table:table-cell>
          <table:table-cell table:style-name="ce5" table:formula="of:=[.F18] * ( (10/15) * [$Annahmen.$B$19] + (5/15) * [$Annahmen.$B$20] )" office:value-type="currency" office:currency="EUR" office:value="601.573052275106" calcext:value-type="currency">
            <text:p>601,57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8:.I18])+[.T18]" office:value-type="currency" office:currency="EUR" office:value="1561.95592130818" calcext:value-type="currency">
            <text:p>1.561,96 €</text:p>
          </table:table-cell>
          <table:table-cell table:style-name="ce14" table:formula="of:=[.J18]/[$Annahmen.$B$14]" office:value-type="percentage" office:value="0.0867373572740478" calcext:value-type="percentage">
            <text:p>8,67 %</text:p>
          </table:table-cell>
          <table:table-cell table:style-name="ce5" table:formula="of:=[.L17]+[.J18]" office:value-type="currency" office:currency="EUR" office:value="46952.4558212043" calcext:value-type="currency">
            <text:p>46.952,46 €</text:p>
          </table:table-cell>
          <table:table-cell table:style-name="ce5" table:formula="of:=[.J18]/(1+[$Annahmen.$B$39])^[.A18]" office:value-type="currency" office:currency="EUR" office:value="973.359290678352" calcext:value-type="currency">
            <text:p>973,36 €</text:p>
          </table:table-cell>
          <table:table-cell table:formula="of:=IF([.L18]&gt;=[$Annahmen.$B$14];&quot;JA&quot;;&quot;&quot;)" office:value-type="string" office:string-value="JA" calcext:value-type="string">
            <text:p>JA</text:p>
          </table:table-cell>
          <table:table-cell table:style-name="ce1" table:formula="of:=IF([.A18]&lt;=[$Annahmen.$B$36];[$Annahmen.$B$33];0)" office:value-type="float" office:value="0" calcext:value-type="float">
            <text:p>0</text:p>
          </table:table-cell>
          <table:table-cell table:style-name="ce1" table:formula="of:=MIN([.O18]*[$Annahmen.$B$34];[.C18])" office:value-type="float" office:value="0" calcext:value-type="float">
            <text:p>0</text:p>
          </table:table-cell>
          <table:table-cell table:style-name="ce1" table:formula="of:=MAX([.O18]-[.P18];0)" office:value-type="float" office:value="0" calcext:value-type="float">
            <text:p>0</text:p>
          </table:table-cell>
          <table:table-cell table:style-name="ce1" table:formula="of:=[.P18]*[$Annahmen.$B$18]" office:value-type="float" office:value="0" calcext:value-type="float">
            <text:p>0</text:p>
          </table:table-cell>
          <table:table-cell table:style-name="ce1" table:formula="of:=[.Q18]*[$Annahmen.$B$35]" office:value-type="float" office:value="0" calcext:value-type="float">
            <text:p>0</text:p>
          </table:table-cell>
          <table:table-cell table:style-name="ce1" table:formula="of:=SUM([.R18:.S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table:formula="of:=[.B18]*(1-[$Annahmen.$B$11])" office:value-type="float" office:value="11508.6557779991" calcext:value-type="float">
            <text:p>11509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9]*[.E19];MAX([.C19]-[.P19];0))" office:value-type="float" office:value="3452.59673339972" calcext:value-type="float">
            <text:p>3453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9]-[.D19];0)" office:value-type="float" office:value="8056.05904459934" calcext:value-type="float">
            <text:p>8056</text:p>
          </table:table-cell>
          <table:table-cell table:style-name="ce5" table:formula="of:=[.D19]*[$Annahmen.$B$18]" office:value-type="currency" office:currency="EUR" office:value="1104.83095468791" calcext:value-type="currency">
            <text:p>1.104,83 €</text:p>
          </table:table-cell>
          <table:table-cell table:style-name="ce5" table:formula="of:=[.F19] * ( (10/15) * [$Annahmen.$B$19] + (5/15) * [$Annahmen.$B$20] )" office:value-type="currency" office:currency="EUR" office:value="598.565187013731" calcext:value-type="currency">
            <text:p>598,57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9:.I19])+[.T19]" office:value-type="currency" office:currency="EUR" office:value="1553.39614170164" calcext:value-type="currency">
            <text:p>1.553,40 €</text:p>
          </table:table-cell>
          <table:table-cell table:style-name="ce14" table:formula="of:=[.J19]/[$Annahmen.$B$14]" office:value-type="percentage" office:value="0.0862620220537698" calcext:value-type="percentage">
            <text:p>8,63 %</text:p>
          </table:table-cell>
          <table:table-cell table:style-name="ce5" table:formula="of:=[.L18]+[.J19]" office:value-type="currency" office:currency="EUR" office:value="48505.8519629059" calcext:value-type="currency">
            <text:p>48.505,85 €</text:p>
          </table:table-cell>
          <table:table-cell table:style-name="ce5" table:formula="of:=[.J19]/(1+[$Annahmen.$B$39])^[.A19]" office:value-type="currency" office:currency="EUR" office:value="939.830212641306" calcext:value-type="currency">
            <text:p>939,83 €</text:p>
          </table:table-cell>
          <table:table-cell table:formula="of:=IF([.L19]&gt;=[$Annahmen.$B$14];&quot;JA&quot;;&quot;&quot;)" office:value-type="string" office:string-value="JA" calcext:value-type="string">
            <text:p>JA</text:p>
          </table:table-cell>
          <table:table-cell table:style-name="ce1" table:formula="of:=IF([.A19]&lt;=[$Annahmen.$B$36];[$Annahmen.$B$33];0)" office:value-type="float" office:value="0" calcext:value-type="float">
            <text:p>0</text:p>
          </table:table-cell>
          <table:table-cell table:style-name="ce1" table:formula="of:=MIN([.O19]*[$Annahmen.$B$34];[.C19])" office:value-type="float" office:value="0" calcext:value-type="float">
            <text:p>0</text:p>
          </table:table-cell>
          <table:table-cell table:style-name="ce1" table:formula="of:=MAX([.O19]-[.P19];0)" office:value-type="float" office:value="0" calcext:value-type="float">
            <text:p>0</text:p>
          </table:table-cell>
          <table:table-cell table:style-name="ce1" table:formula="of:=[.P19]*[$Annahmen.$B$18]" office:value-type="float" office:value="0" calcext:value-type="float">
            <text:p>0</text:p>
          </table:table-cell>
          <table:table-cell table:style-name="ce1" table:formula="of:=[.Q19]*[$Annahmen.$B$35]" office:value-type="float" office:value="0" calcext:value-type="float">
            <text:p>0</text:p>
          </table:table-cell>
          <table:table-cell table:style-name="ce1" table:formula="of:=SUM([.R19:.S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table:formula="of:=[.B19]*(1-[$Annahmen.$B$11])" office:value-type="float" office:value="11451.1124991091" calcext:value-type="float">
            <text:p>11451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20]*[.E20];MAX([.C20]-[.P20];0))" office:value-type="float" office:value="3435.33374973272" calcext:value-type="float">
            <text:p>3435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0]-[.D20];0)" office:value-type="float" office:value="8015.77874937634" calcext:value-type="float">
            <text:p>8016</text:p>
          </table:table-cell>
          <table:table-cell table:style-name="ce5" table:formula="of:=[.D20]*[$Annahmen.$B$18]" office:value-type="currency" office:currency="EUR" office:value="1099.30679991447" calcext:value-type="currency">
            <text:p>1.099,31 €</text:p>
          </table:table-cell>
          <table:table-cell table:style-name="ce5" table:formula="of:=[.F20] * ( (10/15) * [$Annahmen.$B$19] + (5/15) * [$Annahmen.$B$20] )" office:value-type="currency" office:currency="EUR" office:value="595.572361078662" calcext:value-type="currency">
            <text:p>595,57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20:.I20])+[.T20]" office:value-type="currency" office:currency="EUR" office:value="1544.87916099313" calcext:value-type="currency">
            <text:p>1.544,88 €</text:p>
          </table:table-cell>
          <table:table-cell table:style-name="ce14" table:formula="of:=[.J20]/[$Annahmen.$B$14]" office:value-type="percentage" office:value="0.0857890635095931" calcext:value-type="percentage">
            <text:p>8,58 %</text:p>
          </table:table-cell>
          <table:table-cell table:style-name="ce5" table:formula="of:=[.L19]+[.J20]" office:value-type="currency" office:currency="EUR" office:value="50050.731123899" calcext:value-type="currency">
            <text:p>50.050,73 €</text:p>
          </table:table-cell>
          <table:table-cell table:style-name="ce5" table:formula="of:=[.J20]/(1+[$Annahmen.$B$39])^[.A20]" office:value-type="currency" office:currency="EUR" office:value="907.453688586132" calcext:value-type="currency">
            <text:p>907,45 €</text:p>
          </table:table-cell>
          <table:table-cell table:formula="of:=IF([.L20]&gt;=[$Annahmen.$B$14];&quot;JA&quot;;&quot;&quot;)" office:value-type="string" office:string-value="JA" calcext:value-type="string">
            <text:p>JA</text:p>
          </table:table-cell>
          <table:table-cell table:style-name="ce1" table:formula="of:=IF([.A20]&lt;=[$Annahmen.$B$36];[$Annahmen.$B$33];0)" office:value-type="float" office:value="0" calcext:value-type="float">
            <text:p>0</text:p>
          </table:table-cell>
          <table:table-cell table:style-name="ce1" table:formula="of:=MIN([.O20]*[$Annahmen.$B$34];[.C20])" office:value-type="float" office:value="0" calcext:value-type="float">
            <text:p>0</text:p>
          </table:table-cell>
          <table:table-cell table:style-name="ce1" table:formula="of:=MAX([.O20]-[.P20];0)" office:value-type="float" office:value="0" calcext:value-type="float">
            <text:p>0</text:p>
          </table:table-cell>
          <table:table-cell table:style-name="ce1" table:formula="of:=[.P20]*[$Annahmen.$B$18]" office:value-type="float" office:value="0" calcext:value-type="float">
            <text:p>0</text:p>
          </table:table-cell>
          <table:table-cell table:style-name="ce1" table:formula="of:=[.Q20]*[$Annahmen.$B$35]" office:value-type="float" office:value="0" calcext:value-type="float">
            <text:p>0</text:p>
          </table:table-cell>
          <table:table-cell table:style-name="ce1" table:formula="of:=SUM([.R20:.S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table:formula="of:=[.B20]*(1-[$Annahmen.$B$11])" office:value-type="float" office:value="11393.8569366135" calcext:value-type="float">
            <text:p>11394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21]*[.E21];MAX([.C21]-[.P21];0))" office:value-type="float" office:value="3418.15708098405" calcext:value-type="float">
            <text:p>3418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1]-[.D21];0)" office:value-type="float" office:value="7975.69985562946" calcext:value-type="float">
            <text:p>7976</text:p>
          </table:table-cell>
          <table:table-cell table:style-name="ce5" table:formula="of:=[.D21]*[$Annahmen.$B$18]" office:value-type="currency" office:currency="EUR" office:value="1093.8102659149" calcext:value-type="currency">
            <text:p>1.093,81 €</text:p>
          </table:table-cell>
          <table:table-cell table:style-name="ce5" table:formula="of:=[.F21] * ( (10/15) * [$Annahmen.$B$19] + (5/15) * [$Annahmen.$B$20] )" office:value-type="currency" office:currency="EUR" office:value="592.594499273269" calcext:value-type="currency">
            <text:p>592,59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21:.I21])+[.T21]" office:value-type="currency" office:currency="EUR" office:value="1536.40476518817" calcext:value-type="currency">
            <text:p>1.536,40 €</text:p>
          </table:table-cell>
          <table:table-cell table:style-name="ce14" table:formula="of:=[.J21]/[$Annahmen.$B$14]" office:value-type="percentage" office:value="0.0853184697581373" calcext:value-type="percentage">
            <text:p>8,53 %</text:p>
          </table:table-cell>
          <table:table-cell table:style-name="ce5" table:formula="of:=[.L20]+[.J21]" office:value-type="currency" office:currency="EUR" office:value="51587.1358890872" calcext:value-type="currency">
            <text:p>51.587,14 €</text:p>
          </table:table-cell>
          <table:table-cell table:style-name="ce5" table:formula="of:=[.J21]/(1+[$Annahmen.$B$39])^[.A21]" office:value-type="currency" office:currency="EUR" office:value="876.190169114067" calcext:value-type="currency">
            <text:p>876,19 €</text:p>
          </table:table-cell>
          <table:table-cell table:formula="of:=IF([.L21]&gt;=[$Annahmen.$B$14];&quot;JA&quot;;&quot;&quot;)" office:value-type="string" office:string-value="JA" calcext:value-type="string">
            <text:p>JA</text:p>
          </table:table-cell>
          <table:table-cell table:style-name="ce1" table:formula="of:=IF([.A21]&lt;=[$Annahmen.$B$36];[$Annahmen.$B$33];0)" office:value-type="float" office:value="0" calcext:value-type="float">
            <text:p>0</text:p>
          </table:table-cell>
          <table:table-cell table:style-name="ce1" table:formula="of:=MIN([.O21]*[$Annahmen.$B$34];[.C21])" office:value-type="float" office:value="0" calcext:value-type="float">
            <text:p>0</text:p>
          </table:table-cell>
          <table:table-cell table:style-name="ce1" table:formula="of:=MAX([.O21]-[.P21];0)" office:value-type="float" office:value="0" calcext:value-type="float">
            <text:p>0</text:p>
          </table:table-cell>
          <table:table-cell table:style-name="ce1" table:formula="of:=[.P21]*[$Annahmen.$B$18]" office:value-type="float" office:value="0" calcext:value-type="float">
            <text:p>0</text:p>
          </table:table-cell>
          <table:table-cell table:style-name="ce1" table:formula="of:=[.Q21]*[$Annahmen.$B$35]" office:value-type="float" office:value="0" calcext:value-type="float">
            <text:p>0</text:p>
          </table:table-cell>
          <table:table-cell table:style-name="ce1" table:formula="of:=SUM([.R21:.S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table:formula="of:=[.B21]*(1-[$Annahmen.$B$11])" office:value-type="float" office:value="11336.8876519304" calcext:value-type="float">
            <text:p>11337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22]*[.E22];MAX([.C22]-[.P22];0))" office:value-type="float" office:value="3401.06629557913" calcext:value-type="float">
            <text:p>3401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2]-[.D22];0)" office:value-type="float" office:value="7935.82135635131" calcext:value-type="float">
            <text:p>7936</text:p>
          </table:table-cell>
          <table:table-cell table:style-name="ce5" table:formula="of:=[.D22]*[$Annahmen.$B$18]" office:value-type="currency" office:currency="EUR" office:value="1088.34121458532" calcext:value-type="currency">
            <text:p>1.088,34 €</text:p>
          </table:table-cell>
          <table:table-cell table:style-name="ce5" table:formula="of:=[.F22] * ( (10/15) * [$Annahmen.$B$19] + (5/15) * [$Annahmen.$B$20] )" office:value-type="currency" office:currency="EUR" office:value="589.631526776902" calcext:value-type="currency">
            <text:p>589,63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22:.I22])+[.T22]" office:value-type="currency" office:currency="EUR" office:value="1527.97274136222" calcext:value-type="currency">
            <text:p>1.527,97 €</text:p>
          </table:table-cell>
          <table:table-cell table:style-name="ce14" table:formula="of:=[.J22]/[$Annahmen.$B$14]" office:value-type="percentage" office:value="0.0848502289754388" calcext:value-type="percentage">
            <text:p>8,49 %</text:p>
          </table:table-cell>
          <table:table-cell table:style-name="ce5" table:formula="of:=[.L21]+[.J22]" office:value-type="currency" office:currency="EUR" office:value="53115.1086304494" calcext:value-type="currency">
            <text:p>53.115,11 €</text:p>
          </table:table-cell>
          <table:table-cell table:style-name="ce5" table:formula="of:=[.J22]/(1+[$Annahmen.$B$39])^[.A22]" office:value-type="currency" office:currency="EUR" office:value="846.001459949891" calcext:value-type="currency">
            <text:p>846,00 €</text:p>
          </table:table-cell>
          <table:table-cell table:formula="of:=IF([.L22]&gt;=[$Annahmen.$B$14];&quot;JA&quot;;&quot;&quot;)" office:value-type="string" office:string-value="JA" calcext:value-type="string">
            <text:p>JA</text:p>
          </table:table-cell>
          <table:table-cell table:style-name="ce1" table:formula="of:=IF([.A22]&lt;=[$Annahmen.$B$36];[$Annahmen.$B$33];0)" office:value-type="float" office:value="0" calcext:value-type="float">
            <text:p>0</text:p>
          </table:table-cell>
          <table:table-cell table:style-name="ce1" table:formula="of:=MIN([.O22]*[$Annahmen.$B$34];[.C22])" office:value-type="float" office:value="0" calcext:value-type="float">
            <text:p>0</text:p>
          </table:table-cell>
          <table:table-cell table:style-name="ce1" table:formula="of:=MAX([.O22]-[.P22];0)" office:value-type="float" office:value="0" calcext:value-type="float">
            <text:p>0</text:p>
          </table:table-cell>
          <table:table-cell table:style-name="ce1" table:formula="of:=[.P22]*[$Annahmen.$B$18]" office:value-type="float" office:value="0" calcext:value-type="float">
            <text:p>0</text:p>
          </table:table-cell>
          <table:table-cell table:style-name="ce1" table:formula="of:=[.Q22]*[$Annahmen.$B$35]" office:value-type="float" office:value="0" calcext:value-type="float">
            <text:p>0</text:p>
          </table:table-cell>
          <table:table-cell table:style-name="ce1" table:formula="of:=SUM([.R22:.S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table:formula="of:=[.B22]*(1-[$Annahmen.$B$11])" office:value-type="float" office:value="11280.2032136708" calcext:value-type="float">
            <text:p>11280</text:p>
          </table:table-cell>
          <table:table-cell office:value-type="float" office:value="15001" calcext:value-type="float">
            <text:p>15001</text:p>
          </table:table-cell>
          <table:table-cell table:style-name="ce13" table:formula="of:=MIN([.B23]*[.E23];MAX([.C23]-[.P23];0))" office:value-type="float" office:value="3384.06096410124" calcext:value-type="float">
            <text:p>3384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3]-[.D23];0)" office:value-type="float" office:value="7896.14224956955" calcext:value-type="float">
            <text:p>7896</text:p>
          </table:table-cell>
          <table:table-cell table:style-name="ce5" table:formula="of:=[.D23]*[$Annahmen.$B$18]" office:value-type="currency" office:currency="EUR" office:value="1082.8995085124" calcext:value-type="currency">
            <text:p>1.082,90 €</text:p>
          </table:table-cell>
          <table:table-cell table:style-name="ce5" table:formula="of:=[.F23] * ( (10/15) * [$Annahmen.$B$19] + (5/15) * [$Annahmen.$B$20] )" office:value-type="currency" office:currency="EUR" office:value="586.683369143018" calcext:value-type="currency">
            <text:p>586,68 €</text:p>
          </table:table-cell>
          <table:table-cell office:value-type="currency" office:currency="EUR" office:value="-149" calcext:value-type="currency">
            <text:p>-149,00 €</text:p>
          </table:table-cell>
          <table:table-cell table:formula="of:=SUM([.G23:.I23])+[.T23]" office:value-type="currency" office:currency="EUR" office:value="1520.58287765541" calcext:value-type="currency">
            <text:p>1.520,58 €</text:p>
          </table:table-cell>
          <table:table-cell table:style-name="ce14" table:formula="of:=[.J23]/[$Annahmen.$B$14]" office:value-type="percentage" office:value="0.0844398606418642" calcext:value-type="percentage">
            <text:p>8,44 %</text:p>
          </table:table-cell>
          <table:table-cell table:style-name="ce5" table:formula="of:=[.L22]+[.J23]" office:value-type="currency" office:currency="EUR" office:value="54635.6915081048" calcext:value-type="currency">
            <text:p>54.635,69 €</text:p>
          </table:table-cell>
          <table:table-cell table:style-name="ce5" table:formula="of:=[.J23]/(1+[$Annahmen.$B$39])^[.A23]" office:value-type="currency" office:currency="EUR" office:value="817.388224843387" calcext:value-type="currency">
            <text:p>817,39 €</text:p>
          </table:table-cell>
          <table:table-cell table:formula="of:=IF([.L23]&gt;=[$Annahmen.$B$14];&quot;JA&quot;;&quot;&quot;)" office:value-type="string" office:string-value="JA" calcext:value-type="string">
            <text:p>JA</text:p>
          </table:table-cell>
          <table:table-cell table:style-name="ce1" table:formula="of:=IF([.A23]&lt;=[$Annahmen.$B$36];[$Annahmen.$B$33];0)" office:value-type="float" office:value="0" calcext:value-type="float">
            <text:p>0</text:p>
          </table:table-cell>
          <table:table-cell table:style-name="ce1" table:formula="of:=MIN([.O23]*[$Annahmen.$B$34];[.C23])" office:value-type="float" office:value="0" calcext:value-type="float">
            <text:p>0</text:p>
          </table:table-cell>
          <table:table-cell table:style-name="ce1" table:formula="of:=MAX([.O23]-[.P23];0)" office:value-type="float" office:value="0" calcext:value-type="float">
            <text:p>0</text:p>
          </table:table-cell>
          <table:table-cell table:style-name="ce1" table:formula="of:=[.P23]*[$Annahmen.$B$18]" office:value-type="float" office:value="0" calcext:value-type="float">
            <text:p>0</text:p>
          </table:table-cell>
          <table:table-cell table:style-name="ce1" table:formula="of:=[.Q23]*[$Annahmen.$B$35]" office:value-type="float" office:value="0" calcext:value-type="float">
            <text:p>0</text:p>
          </table:table-cell>
          <table:table-cell table:style-name="ce1" table:formula="of:=SUM([.R23:.S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table:formula="of:=[.B23]*(1-[$Annahmen.$B$11])" office:value-type="float" office:value="11223.8021976024" calcext:value-type="float">
            <text:p>11224</text:p>
          </table:table-cell>
          <table:table-cell office:value-type="float" office:value="15002" calcext:value-type="float">
            <text:p>15002</text:p>
          </table:table-cell>
          <table:table-cell table:style-name="ce13" table:formula="of:=MIN([.B24]*[.E24];MAX([.C24]-[.P24];0))" office:value-type="float" office:value="3367.14065928073" calcext:value-type="float">
            <text:p>3367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4]-[.D24];0)" office:value-type="float" office:value="7856.66153832171" calcext:value-type="float">
            <text:p>7857</text:p>
          </table:table-cell>
          <table:table-cell table:style-name="ce5" table:formula="of:=[.D24]*[$Annahmen.$B$18]" office:value-type="currency" office:currency="EUR" office:value="1077.48501096983" calcext:value-type="currency">
            <text:p>1.077,49 €</text:p>
          </table:table-cell>
          <table:table-cell table:style-name="ce5" table:formula="of:=[.F24] * ( (10/15) * [$Annahmen.$B$19] + (5/15) * [$Annahmen.$B$20] )" office:value-type="currency" office:currency="EUR" office:value="583.749952297303" calcext:value-type="currency">
            <text:p>583,75 €</text:p>
          </table:table-cell>
          <table:table-cell office:value-type="currency" office:currency="EUR" office:value="-148" calcext:value-type="currency">
            <text:p>-148,00 €</text:p>
          </table:table-cell>
          <table:table-cell table:formula="of:=SUM([.G24:.I24])+[.T24]" office:value-type="currency" office:currency="EUR" office:value="1513.23496326714" calcext:value-type="currency">
            <text:p>1.513,23 €</text:p>
          </table:table-cell>
          <table:table-cell table:style-name="ce14" table:formula="of:=[.J24]/[$Annahmen.$B$14]" office:value-type="percentage" office:value="0.0840318218061836" calcext:value-type="percentage">
            <text:p>8,40 %</text:p>
          </table:table-cell>
          <table:table-cell table:style-name="ce5" table:formula="of:=[.L23]+[.J24]" office:value-type="currency" office:currency="EUR" office:value="56148.926471372" calcext:value-type="currency">
            <text:p>56.148,93 €</text:p>
          </table:table-cell>
          <table:table-cell table:style-name="ce5" table:formula="of:=[.J24]/(1+[$Annahmen.$B$39])^[.A24]" office:value-type="currency" office:currency="EUR" office:value="789.745979402453" calcext:value-type="currency">
            <text:p>789,75 €</text:p>
          </table:table-cell>
          <table:table-cell table:formula="of:=IF([.L24]&gt;=[$Annahmen.$B$14];&quot;JA&quot;;&quot;&quot;)" office:value-type="string" office:string-value="JA" calcext:value-type="string">
            <text:p>JA</text:p>
          </table:table-cell>
          <table:table-cell table:style-name="ce1" table:formula="of:=IF([.A24]&lt;=[$Annahmen.$B$36];[$Annahmen.$B$33];0)" office:value-type="float" office:value="0" calcext:value-type="float">
            <text:p>0</text:p>
          </table:table-cell>
          <table:table-cell table:style-name="ce1" table:formula="of:=MIN([.O24]*[$Annahmen.$B$34];[.C24])" office:value-type="float" office:value="0" calcext:value-type="float">
            <text:p>0</text:p>
          </table:table-cell>
          <table:table-cell table:style-name="ce1" table:formula="of:=MAX([.O24]-[.P24];0)" office:value-type="float" office:value="0" calcext:value-type="float">
            <text:p>0</text:p>
          </table:table-cell>
          <table:table-cell table:style-name="ce1" table:formula="of:=[.P24]*[$Annahmen.$B$18]" office:value-type="float" office:value="0" calcext:value-type="float">
            <text:p>0</text:p>
          </table:table-cell>
          <table:table-cell table:style-name="ce1" table:formula="of:=[.Q24]*[$Annahmen.$B$35]" office:value-type="float" office:value="0" calcext:value-type="float">
            <text:p>0</text:p>
          </table:table-cell>
          <table:table-cell table:style-name="ce1" table:formula="of:=SUM([.R24:.S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table:formula="of:=[.B24]*(1-[$Annahmen.$B$11])" office:value-type="float" office:value="11167.6831866144" calcext:value-type="float">
            <text:p>11168</text:p>
          </table:table-cell>
          <table:table-cell office:value-type="float" office:value="15003" calcext:value-type="float">
            <text:p>15003</text:p>
          </table:table-cell>
          <table:table-cell table:style-name="ce13" table:formula="of:=MIN([.B25]*[.E25];MAX([.C25]-[.P25];0))" office:value-type="float" office:value="3350.30495598433" calcext:value-type="float">
            <text:p>3350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5]-[.D25];0)" office:value-type="float" office:value="7817.3782306301" calcext:value-type="float">
            <text:p>7817</text:p>
          </table:table-cell>
          <table:table-cell table:style-name="ce5" table:formula="of:=[.D25]*[$Annahmen.$B$18]" office:value-type="currency" office:currency="EUR" office:value="1072.09758591498" calcext:value-type="currency">
            <text:p>1.072,10 €</text:p>
          </table:table-cell>
          <table:table-cell table:style-name="ce5" table:formula="of:=[.F25] * ( (10/15) * [$Annahmen.$B$19] + (5/15) * [$Annahmen.$B$20] )" office:value-type="currency" office:currency="EUR" office:value="580.831202535816" calcext:value-type="currency">
            <text:p>580,83 €</text:p>
          </table:table-cell>
          <table:table-cell office:value-type="currency" office:currency="EUR" office:value="-147" calcext:value-type="currency">
            <text:p>-147,00 €</text:p>
          </table:table-cell>
          <table:table-cell table:formula="of:=SUM([.G25:.I25])+[.T25]" office:value-type="currency" office:currency="EUR" office:value="1505.9287884508" calcext:value-type="currency">
            <text:p>1.505,93 €</text:p>
          </table:table-cell>
          <table:table-cell table:style-name="ce14" table:formula="of:=[.J25]/[$Annahmen.$B$14]" office:value-type="percentage" office:value="0.0836261008209074" calcext:value-type="percentage">
            <text:p>8,36 %</text:p>
          </table:table-cell>
          <table:table-cell table:style-name="ce5" table:formula="of:=[.L24]+[.J25]" office:value-type="currency" office:currency="EUR" office:value="57654.8552598228" calcext:value-type="currency">
            <text:p>57.654,86 €</text:p>
          </table:table-cell>
          <table:table-cell table:style-name="ce5" table:formula="of:=[.J25]/(1+[$Annahmen.$B$39])^[.A25]" office:value-type="currency" office:currency="EUR" office:value="763.041690830748" calcext:value-type="currency">
            <text:p>763,04 €</text:p>
          </table:table-cell>
          <table:table-cell table:formula="of:=IF([.L25]&gt;=[$Annahmen.$B$14];&quot;JA&quot;;&quot;&quot;)" office:value-type="string" office:string-value="JA" calcext:value-type="string">
            <text:p>JA</text:p>
          </table:table-cell>
          <table:table-cell table:style-name="ce1" table:formula="of:=IF([.A25]&lt;=[$Annahmen.$B$36];[$Annahmen.$B$33];0)" office:value-type="float" office:value="0" calcext:value-type="float">
            <text:p>0</text:p>
          </table:table-cell>
          <table:table-cell table:style-name="ce1" table:formula="of:=MIN([.O25]*[$Annahmen.$B$34];[.C25])" office:value-type="float" office:value="0" calcext:value-type="float">
            <text:p>0</text:p>
          </table:table-cell>
          <table:table-cell table:style-name="ce1" table:formula="of:=MAX([.O25]-[.P25];0)" office:value-type="float" office:value="0" calcext:value-type="float">
            <text:p>0</text:p>
          </table:table-cell>
          <table:table-cell table:style-name="ce1" table:formula="of:=[.P25]*[$Annahmen.$B$18]" office:value-type="float" office:value="0" calcext:value-type="float">
            <text:p>0</text:p>
          </table:table-cell>
          <table:table-cell table:style-name="ce1" table:formula="of:=[.Q25]*[$Annahmen.$B$35]" office:value-type="float" office:value="0" calcext:value-type="float">
            <text:p>0</text:p>
          </table:table-cell>
          <table:table-cell table:style-name="ce1" table:formula="of:=SUM([.R25:.S2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table:formula="of:=[.B25]*(1-[$Annahmen.$B$11])" office:value-type="float" office:value="11111.8447706814" calcext:value-type="float">
            <text:p>11112</text:p>
          </table:table-cell>
          <table:table-cell office:value-type="float" office:value="15004" calcext:value-type="float">
            <text:p>15004</text:p>
          </table:table-cell>
          <table:table-cell table:style-name="ce13" table:formula="of:=MIN([.B26]*[.E26];MAX([.C26]-[.P26];0))" office:value-type="float" office:value="3333.55343120441" calcext:value-type="float">
            <text:p>3334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6]-[.D26];0)" office:value-type="float" office:value="7778.29133947695" calcext:value-type="float">
            <text:p>7778</text:p>
          </table:table-cell>
          <table:table-cell table:style-name="ce5" table:formula="of:=[.D26]*[$Annahmen.$B$18]" office:value-type="currency" office:currency="EUR" office:value="1066.73709798541" calcext:value-type="currency">
            <text:p>1.066,74 €</text:p>
          </table:table-cell>
          <table:table-cell table:style-name="ce5" table:formula="of:=[.F26] * ( (10/15) * [$Annahmen.$B$19] + (5/15) * [$Annahmen.$B$20] )" office:value-type="currency" office:currency="EUR" office:value="577.927046523137" calcext:value-type="currency">
            <text:p>577,93 €</text:p>
          </table:table-cell>
          <table:table-cell office:value-type="currency" office:currency="EUR" office:value="-146" calcext:value-type="currency">
            <text:p>-146,00 €</text:p>
          </table:table-cell>
          <table:table-cell table:formula="of:=SUM([.G26:.I26])+[.T26]" office:value-type="currency" office:currency="EUR" office:value="1498.66414450855" calcext:value-type="currency">
            <text:p>1.498,66 €</text:p>
          </table:table-cell>
          <table:table-cell table:style-name="ce14" table:formula="of:=[.J26]/[$Annahmen.$B$14]" office:value-type="percentage" office:value="0.0832226860967836" calcext:value-type="percentage">
            <text:p>8,32 %</text:p>
          </table:table-cell>
          <table:table-cell table:style-name="ce5" table:formula="of:=[.L25]+[.J26]" office:value-type="currency" office:currency="EUR" office:value="59153.5194043313" calcext:value-type="currency">
            <text:p>59.153,52 €</text:p>
          </table:table-cell>
          <table:table-cell table:style-name="ce5" table:formula="of:=[.J26]/(1+[$Annahmen.$B$39])^[.A26]" office:value-type="currency" office:currency="EUR" office:value="737.243452126143" calcext:value-type="currency">
            <text:p>737,24 €</text:p>
          </table:table-cell>
          <table:table-cell table:formula="of:=IF([.L26]&gt;=[$Annahmen.$B$14];&quot;JA&quot;;&quot;&quot;)" office:value-type="string" office:string-value="JA" calcext:value-type="string">
            <text:p>JA</text:p>
          </table:table-cell>
          <table:table-cell table:style-name="ce1" table:formula="of:=IF([.A26]&lt;=[$Annahmen.$B$36];[$Annahmen.$B$33];0)" office:value-type="float" office:value="0" calcext:value-type="float">
            <text:p>0</text:p>
          </table:table-cell>
          <table:table-cell table:style-name="ce1" table:formula="of:=MIN([.O26]*[$Annahmen.$B$34];[.C26])" office:value-type="float" office:value="0" calcext:value-type="float">
            <text:p>0</text:p>
          </table:table-cell>
          <table:table-cell table:style-name="ce1" table:formula="of:=MAX([.O26]-[.P26];0)" office:value-type="float" office:value="0" calcext:value-type="float">
            <text:p>0</text:p>
          </table:table-cell>
          <table:table-cell table:style-name="ce1" table:formula="of:=[.P26]*[$Annahmen.$B$18]" office:value-type="float" office:value="0" calcext:value-type="float">
            <text:p>0</text:p>
          </table:table-cell>
          <table:table-cell table:style-name="ce1" table:formula="of:=[.Q26]*[$Annahmen.$B$35]" office:value-type="float" office:value="0" calcext:value-type="float">
            <text:p>0</text:p>
          </table:table-cell>
          <table:table-cell table:style-name="ce1" table:formula="of:=SUM([.R26:.S2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table:formula="of:=[.B26]*(1-[$Annahmen.$B$11])" office:value-type="float" office:value="11056.2855468279" calcext:value-type="float">
            <text:p>11056</text:p>
          </table:table-cell>
          <table:table-cell office:value-type="float" office:value="15005" calcext:value-type="float">
            <text:p>15005</text:p>
          </table:table-cell>
          <table:table-cell table:style-name="ce13" table:formula="of:=MIN([.B27]*[.E27];MAX([.C27]-[.P27];0))" office:value-type="float" office:value="3316.88566404838" calcext:value-type="float">
            <text:p>3317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7]-[.D27];0)" office:value-type="float" office:value="7739.39988277956" calcext:value-type="float">
            <text:p>7739</text:p>
          </table:table-cell>
          <table:table-cell table:style-name="ce5" table:formula="of:=[.D27]*[$Annahmen.$B$18]" office:value-type="currency" office:currency="EUR" office:value="1061.40341249548" calcext:value-type="currency">
            <text:p>1.061,40 €</text:p>
          </table:table-cell>
          <table:table-cell table:style-name="ce5" table:formula="of:=[.F27] * ( (10/15) * [$Annahmen.$B$19] + (5/15) * [$Annahmen.$B$20] )" office:value-type="currency" office:currency="EUR" office:value="575.037411290521" calcext:value-type="currency">
            <text:p>575,04 €</text:p>
          </table:table-cell>
          <table:table-cell office:value-type="currency" office:currency="EUR" office:value="-145" calcext:value-type="currency">
            <text:p>-145,00 €</text:p>
          </table:table-cell>
          <table:table-cell table:formula="of:=SUM([.G27:.I27])+[.T27]" office:value-type="currency" office:currency="EUR" office:value="1491.440823786" calcext:value-type="currency">
            <text:p>1.491,44 €</text:p>
          </table:table-cell>
          <table:table-cell table:style-name="ce14" table:formula="of:=[.J27]/[$Annahmen.$B$14]" office:value-type="percentage" office:value="0.0828215661025065" calcext:value-type="percentage">
            <text:p>8,28 %</text:p>
          </table:table-cell>
          <table:table-cell table:style-name="ce5" table:formula="of:=[.L26]+[.J27]" office:value-type="currency" office:currency="EUR" office:value="60644.9602281173" calcext:value-type="currency">
            <text:p>60.644,96 €</text:p>
          </table:table-cell>
          <table:table-cell table:style-name="ce5" table:formula="of:=[.J27]/(1+[$Annahmen.$B$39])^[.A27]" office:value-type="currency" office:currency="EUR" office:value="712.320443664392" calcext:value-type="currency">
            <text:p>712,32 €</text:p>
          </table:table-cell>
          <table:table-cell table:formula="of:=IF([.L27]&gt;=[$Annahmen.$B$14];&quot;JA&quot;;&quot;&quot;)" office:value-type="string" office:string-value="JA" calcext:value-type="string">
            <text:p>JA</text:p>
          </table:table-cell>
          <table:table-cell table:style-name="ce1" table:formula="of:=IF([.A27]&lt;=[$Annahmen.$B$36];[$Annahmen.$B$33];0)" office:value-type="float" office:value="0" calcext:value-type="float">
            <text:p>0</text:p>
          </table:table-cell>
          <table:table-cell table:style-name="ce1" table:formula="of:=MIN([.O27]*[$Annahmen.$B$34];[.C27])" office:value-type="float" office:value="0" calcext:value-type="float">
            <text:p>0</text:p>
          </table:table-cell>
          <table:table-cell table:style-name="ce1" table:formula="of:=MAX([.O27]-[.P27];0)" office:value-type="float" office:value="0" calcext:value-type="float">
            <text:p>0</text:p>
          </table:table-cell>
          <table:table-cell table:style-name="ce1" table:formula="of:=[.P27]*[$Annahmen.$B$18]" office:value-type="float" office:value="0" calcext:value-type="float">
            <text:p>0</text:p>
          </table:table-cell>
          <table:table-cell table:style-name="ce1" table:formula="of:=[.Q27]*[$Annahmen.$B$35]" office:value-type="float" office:value="0" calcext:value-type="float">
            <text:p>0</text:p>
          </table:table-cell>
          <table:table-cell table:style-name="ce1" table:formula="of:=SUM([.R27:.S27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4"/>
          <table:table-cell table:style-name="ce1"/>
          <table:table-cell table:number-columns-repeated="1009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style-name="ce1"/>
          <table:table-cell table:number-columns-repeated="1009"/>
        </table:table-row>
        <table:table-row table:style-name="ro2" table:number-rows-repeated="1048545">
          <table:table-cell table:number-columns-repeated="14"/>
          <table:table-cell table:style-name="ce1"/>
          <table:table-cell table:number-columns-repeated="1009"/>
        </table:table-row>
        <table:table-row table:style-name="ro2">
          <table:table-cell table:number-columns-repeated="14"/>
          <table:table-cell table:style-name="ce1"/>
          <table:table-cell table:number-columns-repeated="1009"/>
        </table:table-row>
      </table:table>
      <table:table table:name="Sensitivität" table:style-name="ta3">
        <table:table-column table:style-name="co21" table:default-cell-style-name="ce1"/>
        <table:table-column table:style-name="co22" table:number-columns-repeated="2" table:default-cell-style-name="ce1"/>
        <table:table-column table:style-name="co23" table:number-columns-repeated="2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SENSITIVITÄTSANALYSE: Amortisationszeit in Jah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ompreis</text:p>
          </table:table-cell>
          <table:table-cell table:style-name="ce18" office:value-type="percentage" office:value="0.8" calcext:value-type="percentage">
            <text:p>80,00 %</text:p>
          </table:table-cell>
          <table:table-cell table:style-name="ce18" office:value-type="percentage" office:value="0.9" calcext:value-type="percentage">
            <text:p>90,00 %</text:p>
          </table:table-cell>
          <table:table-cell table:style-name="ce21" office:value-type="percentage" office:value="1" calcext:value-type="percentage">
            <text:p>100,00 %</text:p>
          </table:table-cell>
          <table:table-cell table:style-name="ce18" office:value-type="percentage" office:value="1.1" calcext:value-type="percentage">
            <text:p>110,00 %</text:p>
          </table:table-cell>
          <table:table-cell table:style-name="ce2" office:value-type="string" calcext:value-type="string">
            <text:p>Ertrag der Anlag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currency" office:currency="EUR" office:value="0.25" calcext:value-type="currency">
            <text:p>0,25 €</text:p>
          </table:table-cell>
          <table:table-cell table:style-name="ce19" table:formula="of:=[$Annahmen.$B$14]/((MIN(([$Annahmen.$B$10]*[.B$3])*0.37;MAX([$Jahresrechnung.$C$3]-MIN(([$Annahmen.$B$33]*[.B$3])*[$Annahmen.$B$34];[$Jahresrechnung.$C$3]);0))*[.$A4] + MAX(([$Annahmen.$B$10]*[.B$3])-MIN(([$Annahmen.$B$10]*[.B$3])*0.37;MAX([$Jahresrechnung.$C$3]-MIN(([$Annahmen.$B$33]*[.B$3])*[$Annahmen.$B$34];[$Jahresrechnung.$C$3]);0));0)*([$Annahmen.$B$19]*10/15+[$Annahmen.$B$20]*5/15))-[$Annahmen.$B$15])" office:value-type="float" office:value="16.2376656317222" calcext:value-type="float">
            <text:p>16,2 <text:s/>Jahre</text:p>
          </table:table-cell>
          <table:table-cell table:style-name="ce19" table:formula="of:=[$Annahmen.$B$14]/((MIN(([$Annahmen.$B$10]*[.C$3])*0.37;MAX([$Jahresrechnung.$C$3]-MIN(([$Annahmen.$B$33]*[.C$3])*[$Annahmen.$B$34];[$Jahresrechnung.$C$3]);0))*[.$A4] + MAX(([$Annahmen.$B$10]*[.C$3])-MIN(([$Annahmen.$B$10]*[.C$3])*0.37;MAX([$Jahresrechnung.$C$3]-MIN(([$Annahmen.$B$33]*[.C$3])*[$Annahmen.$B$34];[$Jahresrechnung.$C$3]);0));0)*([$Annahmen.$B$19]*10/15+[$Annahmen.$B$20]*5/15))-[$Annahmen.$B$15])" office:value-type="float" office:value="14.2197814690132" calcext:value-type="float">
            <text:p>14,2 <text:s/>Jahre</text:p>
          </table:table-cell>
          <table:table-cell table:style-name="ce20" table:formula="of:=[$Annahmen.$B$14]/((MIN(([$Annahmen.$B$10]*[.D$3])*0.37;MAX([$Jahresrechnung.$C$3]-MIN(([$Annahmen.$B$33]*[.D$3])*[$Annahmen.$B$34];[$Jahresrechnung.$C$3]);0))*[.$A4] + MAX(([$Annahmen.$B$10]*[.D$3])-MIN(([$Annahmen.$B$10]*[.D$3])*0.37;MAX([$Jahresrechnung.$C$3]-MIN(([$Annahmen.$B$33]*[.D$3])*[$Annahmen.$B$34];[$Jahresrechnung.$C$3]);0));0)*([$Annahmen.$B$19]*10/15+[$Annahmen.$B$20]*5/15))-[$Annahmen.$B$15])" office:value-type="float" office:value="12.6479924981734" calcext:value-type="float">
            <text:p>12,6 <text:s/>Jahre</text:p>
          </table:table-cell>
          <table:table-cell table:style-name="ce19" table:formula="of:=[$Annahmen.$B$14]/((MIN(([$Annahmen.$B$10]*[.E$3])*0.37;MAX([$Jahresrechnung.$C$3]-MIN(([$Annahmen.$B$33]*[.E$3])*[$Annahmen.$B$34];[$Jahresrechnung.$C$3]);0))*[.$A4] + MAX(([$Annahmen.$B$10]*[.E$3])-MIN(([$Annahmen.$B$10]*[.E$3])*0.37;MAX([$Jahresrechnung.$C$3]-MIN(([$Annahmen.$B$33]*[.E$3])*[$Annahmen.$B$34];[$Jahresrechnung.$C$3]);0));0)*([$Annahmen.$B$19]*10/15+[$Annahmen.$B$20]*5/15))-[$Annahmen.$B$15])" office:value-type="float" office:value="11.3890945825029" calcext:value-type="float">
            <text:p>11,4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currency" office:currency="EUR" office:value="0.3" calcext:value-type="currency">
            <text:p>0,30 €</text:p>
          </table:table-cell>
          <table:table-cell table:style-name="ce19" table:formula="of:=[$Annahmen.$B$14]/((MIN(([$Annahmen.$B$10]*[.B$3])*0.37;MAX([$Jahresrechnung.$C$3]-MIN(([$Annahmen.$B$33]*[.B$3])*[$Annahmen.$B$34];[$Jahresrechnung.$C$3]);0))*[.$A5] + MAX(([$Annahmen.$B$10]*[.B$3])-MIN(([$Annahmen.$B$10]*[.B$3])*0.37;MAX([$Jahresrechnung.$C$3]-MIN(([$Annahmen.$B$33]*[.B$3])*[$Annahmen.$B$34];[$Jahresrechnung.$C$3]);0));0)*([$Annahmen.$B$19]*10/15+[$Annahmen.$B$20]*5/15))-[$Annahmen.$B$15])" office:value-type="float" office:value="14.1103853069608" calcext:value-type="float">
            <text:p>14,1 <text:s/>Jahre</text:p>
          </table:table-cell>
          <table:table-cell table:style-name="ce19" table:formula="of:=[$Annahmen.$B$14]/((MIN(([$Annahmen.$B$10]*[.C$3])*0.37;MAX([$Jahresrechnung.$C$3]-MIN(([$Annahmen.$B$33]*[.C$3])*[$Annahmen.$B$34];[$Jahresrechnung.$C$3]);0))*[.$A5] + MAX(([$Annahmen.$B$10]*[.C$3])-MIN(([$Annahmen.$B$10]*[.C$3])*0.37;MAX([$Jahresrechnung.$C$3]-MIN(([$Annahmen.$B$33]*[.C$3])*[$Annahmen.$B$34];[$Jahresrechnung.$C$3]);0));0)*([$Annahmen.$B$19]*10/15+[$Annahmen.$B$20]*5/15))-[$Annahmen.$B$15])" office:value-type="float" office:value="12.3808772153578" calcext:value-type="float">
            <text:p>12,4 <text:s/>Jahre</text:p>
          </table:table-cell>
          <table:table-cell table:style-name="ce20" table:formula="of:=[$Annahmen.$B$14]/((MIN(([$Annahmen.$B$10]*[.D$3])*0.37;MAX([$Jahresrechnung.$C$3]-MIN(([$Annahmen.$B$33]*[.D$3])*[$Annahmen.$B$34];[$Jahresrechnung.$C$3]);0))*[.$A5] + MAX(([$Annahmen.$B$10]*[.D$3])-MIN(([$Annahmen.$B$10]*[.D$3])*0.37;MAX([$Jahresrechnung.$C$3]-MIN(([$Annahmen.$B$33]*[.D$3])*[$Annahmen.$B$34];[$Jahresrechnung.$C$3]);0));0)*([$Annahmen.$B$19]*10/15+[$Annahmen.$B$20]*5/15))-[$Annahmen.$B$15])" office:value-type="float" office:value="11.0290482108112" calcext:value-type="float">
            <text:p>11,0 <text:s/>Jahre</text:p>
          </table:table-cell>
          <table:table-cell table:style-name="ce19" table:formula="of:=[$Annahmen.$B$14]/((MIN(([$Annahmen.$B$10]*[.E$3])*0.37;MAX([$Jahresrechnung.$C$3]-MIN(([$Annahmen.$B$33]*[.E$3])*[$Annahmen.$B$34];[$Jahresrechnung.$C$3]);0))*[.$A5] + MAX(([$Annahmen.$B$10]*[.E$3])-MIN(([$Annahmen.$B$10]*[.E$3])*0.37;MAX([$Jahresrechnung.$C$3]-MIN(([$Annahmen.$B$33]*[.E$3])*[$Annahmen.$B$34];[$Jahresrechnung.$C$3]);0));0)*([$Annahmen.$B$19]*10/15+[$Annahmen.$B$20]*5/15))-[$Annahmen.$B$15])" office:value-type="float" office:value="9.94336363960069" calcext:value-type="float">
            <text:p>9,9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7" office:value-type="currency" office:currency="EUR" office:value="0.32" calcext:value-type="currency">
            <text:p>0,32 €</text:p>
          </table:table-cell>
          <table:table-cell table:style-name="ce20" table:formula="of:=[$Annahmen.$B$14]/((MIN(([$Annahmen.$B$10]*[.B$3])*0.37;MAX([$Jahresrechnung.$C$3]-MIN(([$Annahmen.$B$33]*[.B$3])*[$Annahmen.$B$34];[$Jahresrechnung.$C$3]);0))*[.$A6] + MAX(([$Annahmen.$B$10]*[.B$3])-MIN(([$Annahmen.$B$10]*[.B$3])*0.37;MAX([$Jahresrechnung.$C$3]-MIN(([$Annahmen.$B$33]*[.B$3])*[$Annahmen.$B$34];[$Jahresrechnung.$C$3]);0));0)*([$Annahmen.$B$19]*10/15+[$Annahmen.$B$20]*5/15))-[$Annahmen.$B$15])" office:value-type="float" office:value="13.4077699001783" calcext:value-type="float">
            <text:p>13,4 <text:s/>Jahre</text:p>
          </table:table-cell>
          <table:table-cell table:style-name="ce20" table:formula="of:=[$Annahmen.$B$14]/((MIN(([$Annahmen.$B$10]*[.C$3])*0.37;MAX([$Jahresrechnung.$C$3]-MIN(([$Annahmen.$B$33]*[.C$3])*[$Annahmen.$B$34];[$Jahresrechnung.$C$3]);0))*[.$A6] + MAX(([$Annahmen.$B$10]*[.C$3])-MIN(([$Annahmen.$B$10]*[.C$3])*0.37;MAX([$Jahresrechnung.$C$3]-MIN(([$Annahmen.$B$33]*[.C$3])*[$Annahmen.$B$34];[$Jahresrechnung.$C$3]);0));0)*([$Annahmen.$B$19]*10/15+[$Annahmen.$B$20]*5/15))-[$Annahmen.$B$15])" office:value-type="float" office:value="11.7719377208699" calcext:value-type="float">
            <text:p>11,8 <text:s/>Jahre</text:p>
          </table:table-cell>
          <table:table-cell table:style-name="ce20" table:formula="of:=[$Annahmen.$B$14]/((MIN(([$Annahmen.$B$10]*[.D$3])*0.37;MAX([$Jahresrechnung.$C$3]-MIN(([$Annahmen.$B$33]*[.D$3])*[$Annahmen.$B$34];[$Jahresrechnung.$C$3]);0))*[.$A6] + MAX(([$Annahmen.$B$10]*[.D$3])-MIN(([$Annahmen.$B$10]*[.D$3])*0.37;MAX([$Jahresrechnung.$C$3]-MIN(([$Annahmen.$B$33]*[.D$3])*[$Annahmen.$B$34];[$Jahresrechnung.$C$3]);0));0)*([$Annahmen.$B$19]*10/15+[$Annahmen.$B$20]*5/15))-[$Annahmen.$B$15])" office:value-type="float" office:value="10.4918643425085" calcext:value-type="float">
            <text:p>10,5 <text:s/>Jahre</text:p>
          </table:table-cell>
          <table:table-cell table:style-name="ce20" table:formula="of:=[$Annahmen.$B$14]/((MIN(([$Annahmen.$B$10]*[.E$3])*0.37;MAX([$Jahresrechnung.$C$3]-MIN(([$Annahmen.$B$33]*[.E$3])*[$Annahmen.$B$34];[$Jahresrechnung.$C$3]);0))*[.$A6] + MAX(([$Annahmen.$B$10]*[.E$3])-MIN(([$Annahmen.$B$10]*[.E$3])*0.37;MAX([$Jahresrechnung.$C$3]-MIN(([$Annahmen.$B$33]*[.E$3])*[$Annahmen.$B$34];[$Jahresrechnung.$C$3]);0));0)*([$Annahmen.$B$19]*10/15+[$Annahmen.$B$20]*5/15))-[$Annahmen.$B$15])" office:value-type="float" office:value="9.4628768453238" calcext:value-type="float">
            <text:p>9,5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currency" office:currency="EUR" office:value="0.35" calcext:value-type="currency">
            <text:p>0,35 €</text:p>
          </table:table-cell>
          <table:table-cell table:style-name="ce19" table:formula="of:=[$Annahmen.$B$14]/((MIN(([$Annahmen.$B$10]*[.B$3])*0.37;MAX([$Jahresrechnung.$C$3]-MIN(([$Annahmen.$B$33]*[.B$3])*[$Annahmen.$B$34];[$Jahresrechnung.$C$3]);0))*[.$A7] + MAX(([$Annahmen.$B$10]*[.B$3])-MIN(([$Annahmen.$B$10]*[.B$3])*0.37;MAX([$Jahresrechnung.$C$3]-MIN(([$Annahmen.$B$33]*[.B$3])*[$Annahmen.$B$34];[$Jahresrechnung.$C$3]);0));0)*([$Annahmen.$B$19]*10/15+[$Annahmen.$B$20]*5/15))-[$Annahmen.$B$15])" office:value-type="float" office:value="12.4759266426432" calcext:value-type="float">
            <text:p>12,5 <text:s/>Jahre</text:p>
          </table:table-cell>
          <table:table-cell table:style-name="ce19" table:formula="of:=[$Annahmen.$B$14]/((MIN(([$Annahmen.$B$10]*[.C$3])*0.37;MAX([$Jahresrechnung.$C$3]-MIN(([$Annahmen.$B$33]*[.C$3])*[$Annahmen.$B$34];[$Jahresrechnung.$C$3]);0))*[.$A7] + MAX(([$Annahmen.$B$10]*[.C$3])-MIN(([$Annahmen.$B$10]*[.C$3])*0.37;MAX([$Jahresrechnung.$C$3]-MIN(([$Annahmen.$B$33]*[.C$3])*[$Annahmen.$B$34];[$Jahresrechnung.$C$3]);0));0)*([$Annahmen.$B$19]*10/15+[$Annahmen.$B$20]*5/15))-[$Annahmen.$B$15])" office:value-type="float" office:value="10.9631243451358" calcext:value-type="float">
            <text:p>11,0 <text:s/>Jahre</text:p>
          </table:table-cell>
          <table:table-cell table:style-name="ce20" table:formula="of:=[$Annahmen.$B$14]/((MIN(([$Annahmen.$B$10]*[.D$3])*0.37;MAX([$Jahresrechnung.$C$3]-MIN(([$Annahmen.$B$33]*[.D$3])*[$Annahmen.$B$34];[$Jahresrechnung.$C$3]);0))*[.$A7] + MAX(([$Annahmen.$B$10]*[.D$3])-MIN(([$Annahmen.$B$10]*[.D$3])*0.37;MAX([$Jahresrechnung.$C$3]-MIN(([$Annahmen.$B$33]*[.D$3])*[$Annahmen.$B$34];[$Jahresrechnung.$C$3]);0));0)*([$Annahmen.$B$19]*10/15+[$Annahmen.$B$20]*5/15))-[$Annahmen.$B$15])" office:value-type="float" office:value="9.77752415457254" calcext:value-type="float">
            <text:p>9,8 <text:s/>Jahre</text:p>
          </table:table-cell>
          <table:table-cell table:style-name="ce19" table:formula="of:=[$Annahmen.$B$14]/((MIN(([$Annahmen.$B$10]*[.E$3])*0.37;MAX([$Jahresrechnung.$C$3]-MIN(([$Annahmen.$B$33]*[.E$3])*[$Annahmen.$B$34];[$Jahresrechnung.$C$3]);0))*[.$A7] + MAX(([$Annahmen.$B$10]*[.E$3])-MIN(([$Annahmen.$B$10]*[.E$3])*0.37;MAX([$Jahresrechnung.$C$3]-MIN(([$Annahmen.$B$33]*[.E$3])*[$Annahmen.$B$34];[$Jahresrechnung.$C$3]);0));0)*([$Annahmen.$B$19]*10/15+[$Annahmen.$B$20]*5/15))-[$Annahmen.$B$15])" office:value-type="float" office:value="8.82333061212828" calcext:value-type="float">
            <text:p>8,8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currency" office:currency="EUR" office:value="0.4" calcext:value-type="currency">
            <text:p>0,40 €</text:p>
          </table:table-cell>
          <table:table-cell table:style-name="ce19" table:formula="of:=[$Annahmen.$B$14]/((MIN(([$Annahmen.$B$10]*[.B$3])*0.37;MAX([$Jahresrechnung.$C$3]-MIN(([$Annahmen.$B$33]*[.B$3])*[$Annahmen.$B$34];[$Jahresrechnung.$C$3]);0))*[.$A8] + MAX(([$Annahmen.$B$10]*[.B$3])-MIN(([$Annahmen.$B$10]*[.B$3])*0.37;MAX([$Jahresrechnung.$C$3]-MIN(([$Annahmen.$B$33]*[.B$3])*[$Annahmen.$B$34];[$Jahresrechnung.$C$3]);0));0)*([$Annahmen.$B$19]*10/15+[$Annahmen.$B$20]*5/15))-[$Annahmen.$B$15])" office:value-type="float" office:value="11.1808114650233" calcext:value-type="float">
            <text:p>11,2 <text:s/>Jahre</text:p>
          </table:table-cell>
          <table:table-cell table:style-name="ce19" table:formula="of:=[$Annahmen.$B$14]/((MIN(([$Annahmen.$B$10]*[.C$3])*0.37;MAX([$Jahresrechnung.$C$3]-MIN(([$Annahmen.$B$33]*[.C$3])*[$Annahmen.$B$34];[$Jahresrechnung.$C$3]);0))*[.$A8] + MAX(([$Annahmen.$B$10]*[.C$3])-MIN(([$Annahmen.$B$10]*[.C$3])*0.37;MAX([$Jahresrechnung.$C$3]-MIN(([$Annahmen.$B$33]*[.C$3])*[$Annahmen.$B$34];[$Jahresrechnung.$C$3]);0));0)*([$Annahmen.$B$19]*10/15+[$Annahmen.$B$20]*5/15))-[$Annahmen.$B$15])" office:value-type="float" office:value="9.83670810594986" calcext:value-type="float">
            <text:p>9,8 <text:s/>Jahre</text:p>
          </table:table-cell>
          <table:table-cell table:style-name="ce20" table:formula="of:=[$Annahmen.$B$14]/((MIN(([$Annahmen.$B$10]*[.D$3])*0.37;MAX([$Jahresrechnung.$C$3]-MIN(([$Annahmen.$B$33]*[.D$3])*[$Annahmen.$B$34];[$Jahresrechnung.$C$3]);0))*[.$A8] + MAX(([$Annahmen.$B$10]*[.D$3])-MIN(([$Annahmen.$B$10]*[.D$3])*0.37;MAX([$Jahresrechnung.$C$3]-MIN(([$Annahmen.$B$33]*[.D$3])*[$Annahmen.$B$34];[$Jahresrechnung.$C$3]);0));0)*([$Annahmen.$B$19]*10/15+[$Annahmen.$B$20]*5/15))-[$Annahmen.$B$15])" office:value-type="float" office:value="8.78108796057406" calcext:value-type="float">
            <text:p>8,8 <text:s/>Jahre</text:p>
          </table:table-cell>
          <table:table-cell table:style-name="ce19" table:formula="of:=[$Annahmen.$B$14]/((MIN(([$Annahmen.$B$10]*[.E$3])*0.37;MAX([$Jahresrechnung.$C$3]-MIN(([$Annahmen.$B$33]*[.E$3])*[$Annahmen.$B$34];[$Jahresrechnung.$C$3]);0))*[.$A8] + MAX(([$Annahmen.$B$10]*[.E$3])-MIN(([$Annahmen.$B$10]*[.E$3])*0.37;MAX([$Jahresrechnung.$C$3]-MIN(([$Annahmen.$B$33]*[.E$3])*[$Annahmen.$B$34];[$Jahresrechnung.$C$3]);0));0)*([$Annahmen.$B$19]*10/15+[$Annahmen.$B$20]*5/15))-[$Annahmen.$B$15])" office:value-type="float" office:value="7.9300767593306" calcext:value-type="float">
            <text:p>7,9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nweise:</text:p>
          </table:table-cell>
          <table:table-cell table:number-columns-repeated="1023"/>
        </table:table-row>
        <table:table-row table:style-name="ro1">
          <table:table-cell table:formula="of:=&quot;• Basis-Szenario (32 ct/kWh, 100% Ertrag): &quot;&amp;ROUND([.D6];2)&amp;&quot; Jahre Amortisation (PVGIS-Daten: 7,2 Jahre)&quot;" office:value-type="string" office:string-value="• Basis-Szenario (32 ct/kWh, 100% Ertrag): 10,49 Jahre Amortisation (PVGIS-Daten: 7,2 Jahre)" calcext:value-type="string">
            <text:p>• Basis-Szenario (32 ct/kWh, 100% Ertrag): 10,49 Jahre Amortisation (PVGIS-Daten: 7,2 Jahr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• Bei sinkendem Verbrauch (Kinder ziehen aus) verschlechtert sich die Wirtschaftlichkeit leic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• Bei steigenden Strompreisen amortisiert sich die Anlage deutlich schne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• Selbst bei nur 80% des erwarteten Ertrags liegt die Amortisation unter 15 Jahren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ahmen" table:style-name="ta4">
        <table:table-column table:style-name="co24" table:default-cell-style-name="ce1"/>
        <table:table-column table:style-name="co25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DETAILLIERTE ANNAHMEN DER BERECHN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ort &amp; An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55545 (Bad Kreuzna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chausrichtung</text:p>
          </table:table-cell>
          <table:table-cell office:value-type="string" calcext:value-type="string">
            <text:p>Nord-Nord-Ost (24° Wes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chneigung</text:p>
          </table:table-cell>
          <table:table-cell office:value-type="string" calcext:value-type="string">
            <text:p>30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ügbare Dachfläche</text:p>
          </table:table-cell>
          <table:table-cell office:value-type="string" calcext:value-type="string">
            <text:p>ca. 100 m² (effektiv ~80 m² nutzb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llierte Leistung</text:p>
          </table:table-cell>
          <table:table-cell table:style-name="ce6" table:formula="of:=[$Übersicht.D5]" office:value-type="float" office:value="16.56" calcext:value-type="float">
            <text:p>17 kWp</text:p>
          </table:table-cell>
          <table:table-cell table:style-name="ce6" office:value-type="float" office:value="15.48" calcext:value-type="float">
            <text:p>15 kW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zifischer Ertrag (PVGIS / Jahr)</text:p>
          </table:table-cell>
          <table:table-cell table:style-name="ce8" office:value-type="float" office:value="753" calcext:value-type="float">
            <text:p>753 kWh/kW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ährlicher Ertrag (Jahr 1)</text:p>
          </table:table-cell>
          <table:table-cell table:style-name="ce7" office:value-type="float" office:value="11297" calcext:value-type="float">
            <text:p>11.297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adation pro Jahr</text:p>
          </table:table-cell>
          <table:table-cell table:style-name="ce23" office:value-type="percentage" office:value="0.005" calcext:value-type="percentage">
            <text:p>0,50 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s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tionskosten (1.300 €/kWp, Vollinstallation)</text:p>
          </table:table-cell>
          <table:table-cell table:style-name="ce5" office:value-type="currency" office:currency="EUR" office:value="18007.88" calcext:value-type="currency">
            <text:p>18.007,88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riebskosten pro Jahr (Wartung, Versicherung)</text:p>
          </table:table-cell>
          <table:table-cell table:style-name="ce5" office:value-type="currency" office:currency="EUR" office:value="150" calcext:value-type="currency">
            <text:p>150,00 €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gütung &amp; Pre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preis (Bezug)</text:p>
          </table:table-cell>
          <table:table-cell table:style-name="ce9" office:value-type="float" office:value="0.32" calcext:value-type="float">
            <text:p>0,32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0-10 kWp)</text:p>
          </table:table-cell>
          <table:table-cell table:style-name="ce9" office:value-type="float" office:value="0.0778" calcext:value-type="float">
            <text:p>0,08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&gt;10 kWp)</text:p>
          </table:table-cell>
          <table:table-cell table:style-name="ce9" office:value-type="float" office:value="0.0673" calcext:value-type="float">
            <text:p>0,07 €/kW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brauchsszenar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hre 1-5</text:p>
          </table:table-cell>
          <table:table-cell office:value-type="string" calcext:value-type="string">
            <text:p>21.000 kWh (WP 7.500 + Autos 9.000 + Haushalt 4.50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genverbrauchsquote: 4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hre 6-10</text:p>
          </table:table-cell>
          <table:table-cell office:value-type="string" calcext:value-type="string">
            <text:p>18.000 kWh (WP 7.500 + Autos 6.000 + Haushalt 4.50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genverbrauchsquote: 3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hre 11-20</text:p>
          </table:table-cell>
          <table:table-cell office:value-type="string" calcext:value-type="string">
            <text:p>15.000 kWh (WP 7.500 + Autos 3.000 + Haushalt 4.50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genverbrauchsquote: 3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standsanlage (Südseit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llierte Leistung</text:p>
          </table:table-cell>
          <table:table-cell table:style-name="ce6" office:value-type="float" office:value="11.28" calcext:value-type="float">
            <text:p>11 kW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betriebnahme</text:p>
          </table:table-cell>
          <table:table-cell office:value-type="string" calcext:value-type="string">
            <text:p>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ährlicher Ertrag</text:p>
          </table:table-cell>
          <table:table-cell table:style-name="ce7" office:value-type="float" office:value="12000" calcext:value-type="float">
            <text:p>12.000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rbrauch (kein Akku)</text:p>
          </table:table-cell>
          <table:table-cell table:style-name="ce23" office:value-type="percentage" office:value="0.3" calcext:value-type="percentage">
            <text:p>30,00 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</text:p>
          </table:table-cell>
          <table:table-cell table:style-name="ce9" office:value-type="float" office:value="0.18" calcext:value-type="float">
            <text:p>0,18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aufzeit</text:p>
          </table:table-cell>
          <table:table-cell table:style-name="ce24" table:formula="of:=2013+20-YEAR(TODAY()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anzielle Parame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kontierungssatz</text:p>
          </table:table-cell>
          <table:table-cell table:style-name="ce23" office:value-type="percentage" office:value="0.03" calcext:value-type="percentage">
            <text:p>3,00 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rachtungszeitraum</text:p>
          </table:table-cell>
          <table:table-cell table:style-name="ce22" office:value-type="float" office:value="20" calcext:value-type="float">
            <text:p>20 <text:s/>Jah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ationsanpassung</text:p>
          </table:table-cell>
          <table:table-cell office:value-type="string" calcext:value-type="string">
            <text:p>nicht berücksichtigt (konservativ)</text:p>
          </table:table-cell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Jahresrechnung.A1:Jahresrechnung.N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1"/>
      <number:text> kWp</number:text>
    </number:number-style>
    <number:number-style style:name="N138P0" style:volatile="true">
      <number:number number:decimal-places="0" number:min-decimal-places="0" number:min-integer-digits="1" number:grouping="true"/>
      <number:text> kWh</number:text>
    </number:number-style>
    <number:number-style style:name="N138">
      <number:text>-</number:text>
      <number:number number:decimal-places="0" number:min-decimal-places="0" number:min-integer-digits="0"/>
      <number:text>0 kWh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kWh/kWp</number:text>
    </number:number-style>
    <number:number-style style:name="N139">
      <number:text>-</number:text>
      <number:number number:decimal-places="0" number:min-decimal-places="0" number:min-integer-digits="0"/>
      <number:text>0 kWh/kWp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/kWh</number:text>
    </number:number-style>
    <number:number-style style:name="N140">
      <number:text>-</number:text>
      <number:number number:decimal-places="0" number:min-decimal-places="0" number:min-integer-digits="0"/>
      <number:text>0,00 €/kWh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Jahre</number:text>
    </number:number-style>
    <number:number-style style:name="N141">
      <number:text>-</number:text>
      <number:number number:decimal-places="0" number:min-decimal-places="0" number:min-integer-digits="1" number:grouping="true"/>
      <number:text>  Jahre</number:text>
      <style:map style:condition="value()&gt;=0" style:apply-style-name="N141P0"/>
    </number:number-style>
    <number:percentage-style style:name="N142">
      <number:number number:decimal-places="2" number:min-decimal-places="2" number:min-integer-digits="1"/>
      <number:text> %</number:text>
    </number:percentage-style>
    <number:percentage-style style:name="N143">
      <number:number number:decimal-places="0" number:min-decimal-places="0" number:min-integer-digits="1"/>
      <number:text> %</number:text>
    </number:percentage-style>
    <number:number-style style:name="N144P0" style:volatile="true">
      <number:number number:decimal-places="1" number:min-decimal-places="1" number:min-integer-digits="1" number:grouping="true"/>
      <number:text>  Jahre</number:text>
    </number:number-style>
    <number:number-style style:name="N144">
      <number:text>-</number:text>
      <number:number number:decimal-places="1" number:min-decimal-places="1" number:min-integer-digits="1" number:grouping="true"/>
      <number:text>  Jahre</number:text>
      <style:map style:condition="value()&gt;=0" style:apply-style-name="N14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Übersicht" style:display-name="PageStyle_Übersich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tivität" style:display-name="PageStyle_Sensitivitä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hresrechnung" style:display-name="PageStyle_Jahresrechn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nahmen" style:display-name="PageStyle_Annah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dc:language>de-DE</dc:language>
    <meta:creation-date>2026-02-02T10:07:52</meta:creation-date>
    <dc:date>2026-05-06T10:03:05</dc:date>
    <meta:editing-cycles>22</meta:editing-cycles>
    <meta:generator>LibreOffice/25.8.5.2$Linux_X86_64 LibreOffice_project/580$Build-2</meta:generator>
    <meta:document-statistic meta:table-count="4" meta:cell-count="668" meta:object-count="0"/>
    <meta:user-defined meta:name="AppVersion">3.1</meta:user-defined>
  </office:meta>
</office:document-meta>
</file>